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95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5f9f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1c7293" draw:stroke-linejoin="round" draw:fill="solid" draw:fill-color="#1c729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65a82" draw:stroke-linejoin="round" draw:fill="solid" draw:fill-color="#065a8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35cm" svg:stroke-color="#065a82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-0.071cm" draw:shadow-color="#000000" draw:shadow-opacity="8%"/>
    </style:style>
    <style:style style:name="gr7" style:family="graphic" style:parent-style-name="standard">
      <style:graphic-properties draw:stroke="solid" svg:stroke-width="0.035cm" svg:stroke-color="#e2e8f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-0.071cm" draw:shadow-color="#000000" draw:shadow-opacity="6%"/>
    </style:style>
    <style:style style:name="gr8" style:family="graphic" style:parent-style-name="standard">
      <style:graphic-properties draw:stroke="solid" svg:stroke-width="0.035cm" svg:stroke-color="#e2e8f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-0.106cm" draw:shadow-color="#000000" draw:shadow-opacity="8%"/>
    </style:style>
    <style:style style:name="gr9" style:family="graphic" style:parent-style-name="standard">
      <style:graphic-properties draw:stroke="solid" svg:stroke-width="0.035cm" svg:stroke-color="#e2e8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e7c7b" draw:stroke-linejoin="round" draw:fill="solid" draw:fill-color="#0e7c7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21295c" draw:stroke-linejoin="round" draw:fill="solid" draw:fill-color="#21295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f59e0b" draw:stroke-linejoin="round" draw:fill="solid" draw:fill-color="#fef3c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35cm" svg:stroke-color="#0891b2" draw:stroke-linejoin="round" draw:fill="solid" draw:fill-color="#0891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f59e0b" draw:stroke-linejoin="round" draw:fill="solid" draw:fill-color="#fef3c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65a82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35cm" svg:stroke-color="#1c7293" draw:stroke-linejoin="round" draw:fill="solid" draw:fill-color="#1a27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3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4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5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6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7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8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9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13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pr14" style:family="presentation" style:parent-style-name="DEFAULT-notes" style:list-style-name="L59">
      <style:graphic-properties draw:stroke="none" svg:stroke-width="0cm" draw:fill="none" draw:fill-color="#ffffff" draw:textarea-vertical-align="top" draw:auto-grow-height="false" draw:fit-to-size="false" style:shrink-to-fit="false" fo:min-height="15.24cm" fo:padding-top="0.127cm" fo:padding-bottom="0.127cm" fo:padding-left="0.254cm" fo:padding-right="0.254cm" fo:wrap-option="wrap"/>
    </style:style>
    <style:style style:name="co1" style:family="table-column">
      <style:table-column-properties style:column-width="3.047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5.08cm" style:use-optimal-column-width="false"/>
    </style:style>
    <style:style style:name="co4" style:family="table-column">
      <style:table-column-properties style:column-width="18.796cm" style:use-optimal-column-width="false"/>
    </style:style>
    <style:style style:name="co5" style:family="table-column">
      <style:table-column-properties style:column-width="8.89cm" style:use-optimal-column-width="false"/>
    </style:style>
    <style:style style:name="co6" style:family="table-column">
      <style:table-column-properties style:column-width="5.46cm" style:use-optimal-column-width="false"/>
    </style:style>
    <style:style style:name="co7" style:family="table-column">
      <style:table-column-properties style:column-width="5.463cm" style:use-optimal-column-width="false"/>
    </style:style>
    <style:style style:name="co8" style:family="table-column">
      <style:table-column-properties style:column-width="10.16cm" style:use-optimal-column-width="false"/>
    </style:style>
    <style:style style:name="co9" style:family="table-column">
      <style:table-column-properties style:column-width="2.54cm" style:use-optimal-column-width="false"/>
    </style:style>
    <style:style style:name="co10" style:family="table-column">
      <style:table-column-properties style:column-width="11.939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553cm"/>
    </style:style>
    <style:style style:name="ro3" style:family="table-row">
      <style:table-row-properties style:row-height="1.015cm"/>
    </style:style>
    <style:style style:name="ro4" style:family="table-row">
      <style:table-row-properties style:row-height="1.022cm"/>
    </style:style>
    <style:style style:name="ce1" style:family="table-cell">
      <loext:graphic-properties draw:fill="solid" draw:fill-color="#065a82" draw:textarea-vertical-align="middle" fo:padding-top="0.127cm" fo:padding-bottom="0.127cm" fo:padding-left="0.254cm" fo:padding-right="0.254cm"/>
      <style:paragraph-properties fo:border="0.37pt solid #e2e8f0"/>
    </style:style>
    <style:style style:name="ce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37pt solid #e2e8f0"/>
    </style:style>
    <style:style style:name="ce3" style:family="table-cell">
      <loext:graphic-properties draw:fill="solid" draw:fill-color="#f8fafc" draw:textarea-vertical-align="middle" fo:padding-top="0.127cm" fo:padding-bottom="0.127cm" fo:padding-left="0.254cm" fo:padding-right="0.254cm"/>
      <style:paragraph-properties fo:border="0.37pt solid #e2e8f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1c729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solid" draw:fill-color="#065a82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e7c7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21295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fef3c7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891b2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1a2755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orgia" fo:font-size="64pt" fo:letter-spacing="normal" fo:font-style="normal" style:text-underline-style="none" fo:font-weight="bold" style:font-name-asian="Georgia" style:font-size-asian="64pt" style:font-style-asian="normal" style:font-weight-asian="bold" style:font-name-complex="Georgia" style:font-size-complex="64pt" style:font-style-complex="normal" style:font-weight-complex="bold"/>
    </style:style>
    <style:style style:name="T2" style:family="text">
      <style:text-properties fo:font-variant="normal" fo:text-transform="none" fo:color="#cadcf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cadcfc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" style:family="text">
      <style:text-properties fo:font-variant="normal" fo:text-transform="none" fo:color="#cadcfc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8da9c4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1295c" style:text-line-through-style="none" style:text-line-through-type="none" style:text-position="0% 100%" style:font-name="Georgia" fo:font-size="32pt" fo:letter-spacing="normal" fo:font-style="normal" style:text-underline-style="none" fo:font-weight="bold" style:font-name-asian="Georgia" style:font-size-asian="32pt" style:font-style-asian="normal" style:font-weight-asian="bold" style:font-name-complex="Georgia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10" style:family="text">
      <style:text-properties fo:font-variant="normal" fo:text-transform="none" fo:color="#21295c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64748b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2" style:family="text">
      <style:text-properties fo:font-variant="normal" fo:text-transform="none" fo:color="#64748b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3" style:family="text">
      <style:text-properties fo:font-variant="normal" fo:text-transform="none" fo:color="#1c7293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4" style:family="text">
      <style:text-properties fo:font-variant="normal" fo:text-transform="none" fo:color="#21295c" style:text-line-through-style="none" style:text-line-through-type="none" style:text-position="0% 100%" style:font-name="Georgia" fo:font-size="28pt" fo:letter-spacing="normal" fo:font-style="normal" style:text-underline-style="none" fo:font-weight="bold" style:font-name-asian="Georgia" style:font-size-asian="28pt" style:font-style-asian="normal" style:font-weight-asian="bold" style:font-name-complex="Georgia" style:font-size-complex="28pt" style:font-style-complex="normal" style:font-weight-complex="bold"/>
    </style:style>
    <style:style style:name="T15" style:family="text">
      <style:text-properties fo:font-variant="normal" fo:text-transform="none" fo:color="#065a82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6" style:family="text">
      <style:text-properties fo:font-variant="normal" fo:text-transform="none" fo:color="#1a2332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7" style:family="text">
      <style:text-properties fo:font-variant="normal" fo:text-transform="none" fo:color="#21295c" style:text-line-through-style="none" style:text-line-through-type="none" style:text-position="0% 100%" style:font-name="Georgia" fo:font-size="20pt" fo:letter-spacing="normal" fo:font-style="normal" style:text-underline-style="none" fo:font-weight="bold" style:font-name-asian="Georgia" style:font-size-asian="20pt" style:font-style-asian="normal" style:font-weight-asian="bold" style:font-name-complex="Georgia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065a82" style:text-line-through-style="none" style:text-line-through-type="none" style:text-position="0% 100%" style:font-name="Calibri" fo:font-size="17pt" fo:letter-spacing="normal" fo:font-style="normal" style:text-underline-style="none" fo:font-weight="bold" style:font-name-asian="Calibri" style:font-size-asian="17pt" style:font-style-asian="normal" style:font-weight-asian="bold" style:font-name-complex="Calibri" style:font-size-complex="17pt" style:font-style-complex="normal" style:font-weight-complex="bold"/>
    </style:style>
    <style:style style:name="T20" style:family="text">
      <style:text-properties fo:font-variant="normal" fo:text-transform="none" fo:color="#1a2332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1" style:family="text">
      <style:text-properties fo:font-variant="normal" fo:text-transform="none" fo:color="#065a82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22" style:family="text">
      <style:text-properties fo:font-variant="normal" fo:text-transform="none" fo:color="#64748b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3" style:family="text">
      <style:text-properties fo:font-variant="normal" fo:text-transform="none" fo:color="#64748b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4" style:family="text">
      <style:text-properties fo:font-variant="normal" fo:text-transform="none" fo:color="#21295c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25" style:family="text">
      <style:text-properties fo:font-variant="normal" fo:text-transform="none" fo:color="#065a82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6" style:family="text">
      <style:text-properties fo:font-variant="normal" fo:text-transform="none" fo:color="#1c7293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27" style:family="text">
      <style:text-properties fo:font-variant="normal" fo:text-transform="none" fo:color="#1c7293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8" style:family="text">
      <style:text-properties fo:font-variant="normal" fo:text-transform="none" fo:color="#0e7c7b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29" style:family="text">
      <style:text-properties fo:font-variant="normal" fo:text-transform="none" fo:color="#0e7c7b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fo:font-variant="normal" fo:text-transform="none" fo:color="#21295c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31" style:family="text">
      <style:text-properties fo:font-variant="normal" fo:text-transform="none" fo:color="#21295c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2" style:family="text">
      <style:text-properties fo:font-variant="normal" fo:text-transform="none" fo:color="#64748b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3" style:family="text">
      <style:text-properties fo:font-variant="normal" fo:text-transform="none" fo:color="#cadcfc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Georgia" fo:font-size="14pt" fo:letter-spacing="normal" fo:font-style="normal" style:text-underline-style="none" fo:font-weight="bold" style:font-name-asian="Georgia" style:font-size-asian="14pt" style:font-style-asian="normal" style:font-weight-asian="bold" style:font-name-complex="Georgia" style:font-size-complex="14pt" style:font-style-complex="normal" style:font-weight-complex="bold"/>
    </style:style>
    <style:style style:name="T36" style:family="text">
      <style:text-properties fo:font-variant="normal" fo:text-transform="none" fo:color="#1a2332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7" style:family="text">
      <style:text-properties fo:font-variant="normal" fo:text-transform="none" fo:color="#21295c" style:text-line-through-style="none" style:text-line-through-type="none" style:text-position="0% 100%" style:font-name="Georgia" fo:font-size="26pt" fo:letter-spacing="normal" fo:font-style="normal" style:text-underline-style="none" fo:font-weight="bold" style:font-name-asian="Georgia" style:font-size-asian="26pt" style:font-style-asian="normal" style:font-weight-asian="bold" style:font-name-complex="Georgia" style:font-size-complex="26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9" style:family="text">
      <style:text-properties fo:font-variant="normal" fo:text-transform="none" fo:color="#1a2332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0" style:family="text">
      <style:text-properties fo:font-variant="normal" fo:text-transform="none" fo:color="#1a2332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font-variant="normal" fo:text-transform="none" fo:color="#ef4444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2" style:family="text">
      <style:text-properties fo:font-variant="normal" fo:text-transform="none" fo:color="#ef4444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3" style:family="text">
      <style:text-properties fo:font-variant="normal" fo:text-transform="none" fo:color="#21295c" style:text-line-through-style="none" style:text-line-through-type="none" style:text-position="0% 100%" style:font-name="Calibri" fo:font-size="17pt" fo:letter-spacing="normal" fo:font-style="normal" style:text-underline-style="none" fo:font-weight="bold" style:font-name-asian="Calibri" style:font-size-asian="17pt" style:font-style-asian="normal" style:font-weight-asian="bold" style:font-name-complex="Calibri" style:font-size-complex="17pt" style:font-style-complex="normal" style:font-weight-complex="bold"/>
    </style:style>
    <style:style style:name="T44" style:family="text">
      <style:text-properties fo:font-variant="normal" fo:text-transform="none" fo:color="#64748b" style:text-line-through-style="none" style:text-line-through-type="none" style:text-position="0% 100%" style:font-name="Calibri" fo:font-size="13pt" fo:letter-spacing="normal" fo:font-style="italic" style:text-underline-style="none" fo:font-weight="normal" style:font-name-asian="Calibri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45" style:family="text">
      <style:text-properties fo:font-variant="normal" fo:text-transform="none" fo:color="#64748b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6" style:family="text">
      <style:text-properties fo:font-variant="normal" fo:text-transform="none" fo:color="#1c7293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7" style:family="text">
      <style:text-properties fo:font-variant="normal" fo:text-transform="none" fo:color="#0e7c7b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8" style:family="text">
      <style:text-properties fo:font-variant="normal" fo:text-transform="none" fo:color="#0891b2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9" style:family="text">
      <style:text-properties fo:font-variant="normal" fo:text-transform="none" fo:color="#21295c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50" style:family="text">
      <style:text-properties fo:font-variant="normal" fo:text-transform="none" fo:color="#21295c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51" style:family="text">
      <style:text-properties fo:font-variant="normal" fo:text-transform="none" fo:color="#1a2332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2" style:family="text">
      <style:text-properties fo:font-variant="normal" fo:text-transform="none" fo:color="#92400e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53" style:family="text">
      <style:text-properties fo:font-variant="normal" fo:text-transform="none" fo:color="#1a2332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4" style:family="text">
      <style:text-properties fo:font-variant="normal" fo:text-transform="none" fo:color="#1a2332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5" style:family="text">
      <style:text-properties fo:font-variant="normal" fo:text-transform="none" fo:color="#f59e0b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6" style:family="text">
      <style:text-properties fo:font-variant="normal" fo:text-transform="none" fo:color="#21295c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57" style:family="text">
      <style:text-properties fo:font-variant="normal" fo:text-transform="none" fo:color="#065a82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8" style:family="text">
      <style:text-properties fo:font-variant="normal" fo:text-transform="none" fo:color="#f59e0b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9" style:family="text">
      <style:text-properties fo:font-variant="normal" fo:text-transform="none" fo:color="#065a82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Georgia" fo:font-size="48pt" fo:letter-spacing="normal" fo:font-style="normal" style:text-underline-style="none" fo:font-weight="bold" style:font-name-asian="Georgia" style:font-size-asian="48pt" style:font-style-asian="normal" style:font-weight-asian="bold" style:font-name-complex="Georgia" style:font-size-complex="48pt" style:font-style-complex="normal" style:font-weight-complex="bold"/>
    </style:style>
    <style:style style:name="T61" style:family="text">
      <style:text-properties fo:font-variant="normal" fo:text-transform="none" fo:color="#cadcfc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62" style:family="text">
      <style:text-properties fo:font-variant="normal" fo:text-transform="none" fo:color="#8da9c4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dc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adc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da9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c72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1a23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1c72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1c72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e7c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e7c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cadc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952cm"/>
        <style:text-properties style:font-name="Calibri" fo:color="#1a23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1a23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-">
        <style:list-level-properties text:space-before="0.46cm" text:min-label-width="0.81cm"/>
        <style:text-properties style:font-name="Arial" fo:color="#1a23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1c72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0e7c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891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•">
        <style:list-level-properties text:space-before="0.001cm" text:min-label-width="0.952cm"/>
        <style:text-properties style:font-name="Calibri" fo:color="#1a23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9240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1a23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min-label-width="0.6cm"/>
        <style:text-properties fo:color="#2129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0.6cm"/>
        <style:text-properties fo:color="#065a8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format="">
        <style:list-level-properties text:min-label-width="0.6cm"/>
        <style:text-properties fo:color="#cadc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format="">
        <style:list-level-properties text:min-label-width="0.6cm"/>
        <style:text-properties fo:color="#8da9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3" draw:style-name="gr1" draw:text-style-name="P2" draw:layer="layout" svg:width="30.479cm" svg:height="2.539cm" svg:x="2.032cm" svg:y="5.08cm">
          <text:p text:style-name="P1"><text:span text:style-name="T1">CASSO E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3" draw:style-name="gr1" draw:text-style-name="P2" draw:layer="layout" svg:width="30.479cm" svg:height="1.777cm" svg:x="2.032cm" svg:y="7.62cm">
          <text:p text:style-name="P1"><text:span text:style-name="T2">Kế hoạch 12 tháng &amp; Roadmap chi tiết Q2-Q3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3" draw:style-name="gr2" draw:text-style-name="P3" draw:layer="layout" svg:width="3.809cm" svg:height="0.151cm" svg:x="2.032cm" svg:y="9.7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3" draw:style-name="gr1" draw:text-style-name="P2" draw:layer="layout" svg:width="30.479cm" svg:height="1.269cm" svg:x="2.032cm" svg:y="10.414cm">
          <text:p text:style-name="P1"><text:span text:style-name="T3">Tích hợp Viindoo + CASSO Open Banking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gr1" draw:text-style-name="P2" draw:layer="layout" svg:width="30.479cm" svg:height="1.015cm" svg:x="2.032cm" svg:y="14.732cm">
          <text:p text:style-name="P1"><text:span text:style-name="T4">Trình bày bởi: </text:span><text:span text:style-name="T5">Minh (Product Manag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3" draw:style-name="gr1" draw:text-style-name="P2" draw:layer="layout" svg:width="30.479cm" svg:height="1.015cm" svg:x="2.032cm" svg:y="15.748cm">
          <text:p text:style-name="P1"><text:span text:style-name="T4">Cho: </text:span><text:span text:style-name="T5">Anh Điệp (CEO CASS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gr1" draw:text-style-name="P2" draw:layer="layout" svg:width="30.479cm" svg:height="1.015cm" svg:x="2.032cm" svg:y="16.764cm">
          <text:p text:style-name="P1"><text:span text:style-name="T6">Tháng 5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3" draw:layer="layout" svg:width="15.239cm" svg:height="8.572cm" svg:x="1.905cm" svg:y="3.175cm" draw:page-number="1" presentation:class="page"/>
          <draw:frame draw:name="Google Shape;13;p1:notes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28;p4" draw:style-name="gr1" draw:text-style-name="P2" draw:layer="layout" svg:width="30.479cm" svg:height="1.777cm" svg:x="1.524cm" svg:y="1.27cm">
          <text:p text:style-name="P1"><text:span text:style-name="T8">Nội dung trình bà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4" draw:style-name="gr4" draw:text-style-name="P7" draw:layer="layout" svg:width="1.777cm" svg:height="1.777cm" svg:x="2.032cm" svg:y="3.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;p4" draw:style-name="gr1" draw:text-style-name="P2" draw:layer="layout" svg:width="1.777cm" svg:height="1.777cm" svg:x="2.032cm" svg:y="3.81cm">
          <text:p text:style-name="P8"><text:span text:style-name="T9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4" draw:style-name="gr5" draw:text-style-name="P2" draw:layer="layout" svg:width="12.699cm" svg:height="1.015cm" svg:x="4.318cm" svg:y="3.937cm">
          <text:p text:style-name="P1"><text:span text:style-name="T10">Vision &amp; 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4" draw:style-name="gr5" draw:text-style-name="P2" draw:layer="layout" svg:width="26.669cm" svg:height="0.888cm" svg:x="4.318cm" svg:y="4.826cm">
          <text:p text:style-name="P1"><text:span text:style-name="T11">CASSO ERP là gì và tại sao quan trọng cho CA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gr4" draw:text-style-name="P7" draw:layer="layout" svg:width="1.777cm" svg:height="1.777cm" svg:x="2.032cm" svg:y="6.09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;p4" draw:style-name="gr1" draw:text-style-name="P2" draw:layer="layout" svg:width="1.777cm" svg:height="1.777cm" svg:x="2.032cm" svg:y="6.096cm">
          <text:p text:style-name="P8"><text:span text:style-name="T9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4" draw:style-name="gr5" draw:text-style-name="P2" draw:layer="layout" svg:width="12.699cm" svg:height="1.015cm" svg:x="4.318cm" svg:y="6.223cm">
          <text:p text:style-name="P1"><text:span text:style-name="T10">Tổng quan 12 thá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4" draw:style-name="gr5" draw:text-style-name="P2" draw:layer="layout" svg:width="26.669cm" svg:height="0.888cm" svg:x="4.318cm" svg:y="7.112cm">
          <text:p text:style-name="P1"><text:span text:style-name="T11">4 quý - 4 theme - 4 mục tiêu chiến lượ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4" draw:style-name="gr4" draw:text-style-name="P7" draw:layer="layout" svg:width="1.777cm" svg:height="1.777cm" svg:x="2.032cm" svg:y="8.38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;p4" draw:style-name="gr1" draw:text-style-name="P2" draw:layer="layout" svg:width="1.777cm" svg:height="1.777cm" svg:x="2.032cm" svg:y="8.382cm">
          <text:p text:style-name="P8"><text:span text:style-name="T9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4" draw:style-name="gr5" draw:text-style-name="P2" draw:layer="layout" svg:width="12.699cm" svg:height="1.015cm" svg:x="4.318cm" svg:y="8.509cm">
          <text:p text:style-name="P1"><text:span text:style-name="T10">Chi tiết Q2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4" draw:style-name="gr5" draw:text-style-name="P2" draw:layer="layout" svg:width="26.669cm" svg:height="0.888cm" svg:x="4.318cm" svg:y="9.398cm">
          <text:p text:style-name="P1"><text:span text:style-name="T11">Foundation &amp; Go-live 30/6 - Tháng 5-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4" draw:style-name="gr4" draw:text-style-name="P7" draw:layer="layout" svg:width="1.777cm" svg:height="1.777cm" svg:x="2.032cm" svg:y="10.66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4" draw:style-name="gr1" draw:text-style-name="P2" draw:layer="layout" svg:width="1.777cm" svg:height="1.777cm" svg:x="2.032cm" svg:y="10.668cm">
          <text:p text:style-name="P8"><text:span text:style-name="T9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4" draw:style-name="gr5" draw:text-style-name="P2" draw:layer="layout" svg:width="12.699cm" svg:height="1.015cm" svg:x="4.318cm" svg:y="10.795cm">
          <text:p text:style-name="P1"><text:span text:style-name="T10">Chi tiết Q3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4" draw:style-name="gr5" draw:text-style-name="P2" draw:layer="layout" svg:width="26.669cm" svg:height="0.888cm" svg:x="4.318cm" svg:y="11.684cm">
          <text:p text:style-name="P1"><text:span text:style-name="T11">Stabilization &amp; Product Evolution - Tháng 7-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4" draw:style-name="gr4" draw:text-style-name="P7" draw:layer="layout" svg:width="1.777cm" svg:height="1.777cm" svg:x="2.032cm" svg:y="12.95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;p4" draw:style-name="gr1" draw:text-style-name="P2" draw:layer="layout" svg:width="1.777cm" svg:height="1.777cm" svg:x="2.032cm" svg:y="12.954cm">
          <text:p text:style-name="P8"><text:span text:style-name="T9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4" draw:style-name="gr5" draw:text-style-name="P2" draw:layer="layout" svg:width="12.699cm" svg:height="1.015cm" svg:x="4.318cm" svg:y="13.081cm">
          <text:p text:style-name="P1"><text:span text:style-name="T10">Resource, Risk, Bud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4" draw:style-name="gr5" draw:text-style-name="P2" draw:layer="layout" svg:width="26.669cm" svg:height="0.888cm" svg:x="4.318cm" svg:y="13.97cm">
          <text:p text:style-name="P1"><text:span text:style-name="T11">Cần gì từ leadership để exec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4" draw:style-name="gr4" draw:text-style-name="P7" draw:layer="layout" svg:width="1.777cm" svg:height="1.777cm" svg:x="2.032cm" svg:y="15.2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;p4" draw:style-name="gr1" draw:text-style-name="P2" draw:layer="layout" svg:width="1.777cm" svg:height="1.777cm" svg:x="2.032cm" svg:y="15.24cm">
          <text:p text:style-name="P8"><text:span text:style-name="T9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4" draw:style-name="gr5" draw:text-style-name="P2" draw:layer="layout" svg:width="12.699cm" svg:height="1.015cm" svg:x="4.318cm" svg:y="15.367cm">
          <text:p text:style-name="P1"><text:span text:style-name="T10">Decision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4" draw:style-name="gr5" draw:text-style-name="P2" draw:layer="layout" svg:width="26.669cm" svg:height="0.888cm" svg:x="4.318cm" svg:y="16.256cm">
          <text:p text:style-name="P1"><text:span text:style-name="T11">Các quyết định cần align trong tháng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4" draw:style-name="gr1" draw:text-style-name="P2" draw:layer="layout" svg:width="5.079cm" svg:height="0.761cm" svg:x="27.94cm" svg:y="18.034cm">
          <text:p text:style-name="P9"><text:span text:style-name="T12">CASSO ERP Plan | Minh | 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;p2:notes" draw:style-name="gr3" draw:layer="layout" svg:width="15.239cm" svg:height="8.572cm" svg:x="1.905cm" svg:y="3.175cm" draw:page-number="2" presentation:class="page"/>
          <draw:frame draw:name="Google Shape;25;p2:notes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6;p2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3" draw:style-name="dp4" draw:master-page-name="DEFAULT">
        <draw:custom-shape draw:name="Google Shape;59;p5" draw:style-name="gr1" draw:text-style-name="P2" draw:layer="layout" svg:width="30.479cm" svg:height="1.269cm" svg:x="1.524cm" svg:y="1.016cm">
          <text:p text:style-name="P1"><text:span text:style-name="T13">01 — Vision &amp; 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5" draw:style-name="gr1" draw:text-style-name="P2" draw:layer="layout" svg:width="30.479cm" svg:height="2.285cm" svg:x="1.524cm" svg:y="2.286cm">
          <text:p text:style-name="P1"><text:span text:style-name="T14">CASSO ERP — Hạ tầng kế toán + tài chính cho SME Việt N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5" draw:style-name="gr6" draw:text-style-name="P10" draw:layer="layout" svg:width="30.479cm" svg:height="3.047cm" svg:x="1.524cm" svg:y="5.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5" draw:style-name="gr4" draw:text-style-name="P7" draw:layer="layout" svg:width="0.202cm" svg:height="3.047cm" svg:x="1.524cm" svg:y="5.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5" draw:style-name="gr1" draw:text-style-name="P2" draw:layer="layout" svg:width="29.209cm" svg:height="2.539cm" svg:x="2.286cm" svg:y="5.461cm">
          <text:p text:style-name="P1"><text:span text:style-name="T15">Vision: </text:span><text:span text:style-name="T16">Trở thành nhà cung cấp hạ tầng ERP đầu tiên tại Việt Nam tích hợp sâu Open Banking, giảm 50%+ thời gian kế toán cho SME thông qua tự động hóa sao kê, hóa đơn điện tử, và chữ ký số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5" draw:style-name="gr1" draw:text-style-name="P2" draw:layer="layout" svg:width="30.479cm" svg:height="1.269cm" svg:x="1.524cm" svg:y="8.89cm">
          <text:p text:style-name="P1"><text:span text:style-name="T17">Tại sao đây là cơ hội của CA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5" draw:style-name="gr7" draw:text-style-name="P10" draw:layer="layout" svg:width="10.159cm" svg:height="6.857cm" svg:x="1.524cm" svg:y="10.66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5" draw:style-name="gr1" draw:text-style-name="P2" draw:layer="layout" svg:width="2.031cm" svg:height="1.523cm" svg:x="2.286cm" svg:y="11.176cm">
          <text:p text:style-name="P1"><text:span text:style-name="T18">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5" draw:style-name="gr5" draw:text-style-name="P2" draw:layer="layout" svg:width="8.889cm" svg:height="1.142cm" svg:x="2.286cm" svg:y="12.827cm">
          <text:p text:style-name="P1"><text:span text:style-name="T19">Unfair Advan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5" draw:style-name="gr5" draw:text-style-name="P2" draw:layer="layout" svg:width="8.889cm" svg:height="3.047cm" svg:x="2.286cm" svg:y="14.224cm">
          <text:p text:style-name="P1"><text:span text:style-name="T20">CASSO đã có API ngân hàng + đối tác MB Bank/VietinBank/OCB. Đây là moat mà MISA AMIS, Bravo, Fast chưa có đượ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5" draw:style-name="gr7" draw:text-style-name="P10" draw:layer="layout" svg:width="10.159cm" svg:height="6.857cm" svg:x="12.192cm" svg:y="10.66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5" draw:style-name="gr1" draw:text-style-name="P2" draw:layer="layout" svg:width="2.031cm" svg:height="1.523cm" svg:x="12.954cm" svg:y="11.176cm">
          <text:p text:style-name="P1"><text:span text:style-name="T18">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5" draw:style-name="gr5" draw:text-style-name="P2" draw:layer="layout" svg:width="8.889cm" svg:height="1.142cm" svg:x="12.954cm" svg:y="12.827cm">
          <text:p text:style-name="P1"><text:span text:style-name="T19">Market Ti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5" draw:style-name="gr5" draw:text-style-name="P2" draw:layer="layout" svg:width="8.889cm" svg:height="3.047cm" svg:x="12.954cm" svg:y="14.224cm">
          <text:p text:style-name="P1"><text:span text:style-name="T20">Thông tư 94 (7/2025) tạo sandbox cho Open Banking. Doanh nghiệp VN đang chuyển đổi số mạnh. SME cần ERP afford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5" draw:style-name="gr7" draw:text-style-name="P10" draw:layer="layout" svg:width="10.159cm" svg:height="6.857cm" svg:x="22.86cm" svg:y="10.66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5" draw:style-name="gr1" draw:text-style-name="P2" draw:layer="layout" svg:width="2.031cm" svg:height="1.523cm" svg:x="23.622cm" svg:y="11.176cm">
          <text:p text:style-name="P1"><text:span text:style-name="T18">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5" draw:style-name="gr5" draw:text-style-name="P2" draw:layer="layout" svg:width="8.889cm" svg:height="1.142cm" svg:x="23.622cm" svg:y="12.827cm">
          <text:p text:style-name="P1"><text:span text:style-name="T19">Synergy với CASSO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5" draw:style-name="gr5" draw:text-style-name="P2" draw:layer="layout" svg:width="8.889cm" svg:height="3.047cm" svg:x="23.622cm" svg:y="14.224cm">
          <text:p text:style-name="P1"><text:span text:style-name="T20">Existing customer base của CASSO API là natural channel. Cung cấp hạ tầng ERP upsell giúp tăng ARPU và customer lock-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5" draw:style-name="gr1" draw:text-style-name="P2" draw:layer="layout" svg:width="5.079cm" svg:height="0.761cm" svg:x="27.94cm" svg:y="18.034cm">
          <text:p text:style-name="P9"><text:span text:style-name="T12">CASSO ERP Plan | Minh | 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;p3:notes" draw:style-name="gr3" draw:layer="layout" svg:width="15.239cm" svg:height="8.572cm" svg:x="1.905cm" svg:y="3.175cm" draw:page-number="3" presentation:class="page"/>
          <draw:frame draw:name="Google Shape;56;p3:notes" presentation:style-name="pr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7;p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Google Shape;83;p6" draw:style-name="gr1" draw:text-style-name="P2" draw:layer="layout" svg:width="30.479cm" svg:height="1.269cm" svg:x="1.524cm" svg:y="1.016cm">
          <text:p text:style-name="P1"><text:span text:style-name="T13">02 — Tổng quan 12 thá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6" draw:style-name="gr1" draw:text-style-name="P2" draw:layer="layout" svg:width="30.479cm" svg:height="1.777cm" svg:x="1.524cm" svg:y="2.286cm">
          <text:p text:style-name="P1"><text:span text:style-name="T14">4 quý — 4 theme — 4 mục tiêu chiến lượ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6" draw:style-name="gr8" draw:text-style-name="P10" draw:layer="layout" svg:width="7.619cm" svg:height="12.699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6" draw:style-name="gr4" draw:text-style-name="P7" draw:layer="layout" svg:width="7.619cm" svg:height="0.38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6" draw:style-name="gr5" draw:text-style-name="P2" draw:layer="layout" svg:width="6.603cm" svg:height="1.269cm" svg:x="2.032cm" svg:y="5.334cm">
          <text:p text:style-name="P1"><text:span text:style-name="T21">Q2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6" draw:style-name="gr5" draw:text-style-name="P2" draw:layer="layout" svg:width="6.603cm" svg:height="0.761cm" svg:x="2.032cm" svg:y="6.604cm">
          <text:p text:style-name="P1"><text:span text:style-name="T22">T5-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6" draw:style-name="gr9" draw:text-style-name="P11" draw:layer="layout" svg:width="6.603cm" svg:height="0.001cm" svg:x="2.032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6" draw:style-name="gr5" draw:text-style-name="P2" draw:layer="layout" svg:width="6.603cm" svg:height="0.634cm" svg:x="2.032cm" svg:y="7.874cm">
          <text:p text:style-name="P1"><text:span text:style-name="T23">TH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6" draw:style-name="gr5" draw:text-style-name="P2" draw:layer="layout" svg:width="6.603cm" svg:height="1.777cm" svg:x="2.032cm" svg:y="8.509cm">
          <text:p text:style-name="P1"><text:span text:style-name="T24">Foundation &amp; Go-l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6" draw:style-name="gr5" draw:text-style-name="P2" draw:layer="layout" svg:width="6.603cm" svg:height="0.634cm" svg:x="2.032cm" svg:y="10.922cm">
          <text:p text:style-name="P1"><text:span text:style-name="T23">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6" draw:style-name="gr5" draw:text-style-name="P2" draw:layer="layout" svg:width="6.603cm" svg:height="3.301cm" svg:x="2.032cm" svg:y="11.557cm">
          <text:p text:style-name="P1"><text:span text:style-name="T20">Viindoo + CASSO API go-live nội b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6" draw:style-name="gr5" draw:text-style-name="P2" draw:layer="layout" svg:width="6.603cm" svg:height="0.634cm" svg:x="2.032cm" svg:y="15.113cm">
          <text:p text:style-name="P1"><text:span text:style-name="T23">SUCCESS 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6" draw:style-name="gr5" draw:text-style-name="P2" draw:layer="layout" svg:width="6.603cm" svg:height="1.269cm" svg:x="2.032cm" svg:y="15.748cm">
          <text:p text:style-name="P1"><text:span text:style-name="T25">Team kế toán dùng từ 1/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6" draw:style-name="gr8" draw:text-style-name="P10" draw:layer="layout" svg:width="7.619cm" svg:height="12.699cm" svg:x="9.525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6" draw:style-name="gr2" draw:text-style-name="P3" draw:layer="layout" svg:width="7.619cm" svg:height="0.38cm" svg:x="9.525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6" draw:style-name="gr5" draw:text-style-name="P2" draw:layer="layout" svg:width="6.603cm" svg:height="1.269cm" svg:x="10.033cm" svg:y="5.334cm">
          <text:p text:style-name="P1"><text:span text:style-name="T26">Q3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6" draw:style-name="gr5" draw:text-style-name="P2" draw:layer="layout" svg:width="6.603cm" svg:height="0.761cm" svg:x="10.033cm" svg:y="6.604cm">
          <text:p text:style-name="P1"><text:span text:style-name="T22">T7-T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6" draw:style-name="gr9" draw:text-style-name="P11" draw:layer="layout" svg:width="6.603cm" svg:height="0.001cm" svg:x="10.03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6" draw:style-name="gr5" draw:text-style-name="P2" draw:layer="layout" svg:width="6.603cm" svg:height="0.634cm" svg:x="10.033cm" svg:y="7.874cm">
          <text:p text:style-name="P1"><text:span text:style-name="T23">TH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6" draw:style-name="gr5" draw:text-style-name="P2" draw:layer="layout" svg:width="6.603cm" svg:height="1.777cm" svg:x="10.033cm" svg:y="8.509cm">
          <text:p text:style-name="P1"><text:span text:style-name="T24">Stabilization &amp; 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6" draw:style-name="gr5" draw:text-style-name="P2" draw:layer="layout" svg:width="6.603cm" svg:height="0.634cm" svg:x="10.033cm" svg:y="10.922cm">
          <text:p text:style-name="P1"><text:span text:style-name="T23">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6" draw:style-name="gr5" draw:text-style-name="P2" draw:layer="layout" svg:width="6.603cm" svg:height="3.301cm" svg:x="10.033cm" svg:y="11.557cm">
          <text:p text:style-name="P1"><text:span text:style-name="T20">Đo ROI + Hoàn thiện features + Đánh giá triển vọng Viindoo partn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6" draw:style-name="gr5" draw:text-style-name="P2" draw:layer="layout" svg:width="6.603cm" svg:height="0.634cm" svg:x="10.033cm" svg:y="15.113cm">
          <text:p text:style-name="P1"><text:span text:style-name="T23">SUCCESS 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6" draw:style-name="gr5" draw:text-style-name="P2" draw:layer="layout" svg:width="6.603cm" svg:height="1.269cm" svg:x="10.033cm" svg:y="15.748cm">
          <text:p text:style-name="P1"><text:span text:style-name="T27">ROI Case Study + Features comp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6" draw:style-name="gr8" draw:text-style-name="P10" draw:layer="layout" svg:width="7.619cm" svg:height="12.699cm" svg:x="17.526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6" draw:style-name="gr10" draw:text-style-name="P12" draw:layer="layout" svg:width="7.619cm" svg:height="0.38cm" svg:x="17.526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6" draw:style-name="gr5" draw:text-style-name="P2" draw:layer="layout" svg:width="6.603cm" svg:height="1.269cm" svg:x="18.034cm" svg:y="5.334cm">
          <text:p text:style-name="P1"><text:span text:style-name="T28">Q4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6" draw:style-name="gr5" draw:text-style-name="P2" draw:layer="layout" svg:width="6.603cm" svg:height="0.761cm" svg:x="18.034cm" svg:y="6.604cm">
          <text:p text:style-name="P1"><text:span text:style-name="T22">T10-T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6" draw:style-name="gr9" draw:text-style-name="P11" draw:layer="layout" svg:width="6.603cm" svg:height="0.001cm" svg:x="18.034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6" draw:style-name="gr5" draw:text-style-name="P2" draw:layer="layout" svg:width="6.603cm" svg:height="0.634cm" svg:x="18.034cm" svg:y="7.874cm">
          <text:p text:style-name="P1"><text:span text:style-name="T23">TH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6" draw:style-name="gr5" draw:text-style-name="P2" draw:layer="layout" svg:width="6.603cm" svg:height="1.777cm" svg:x="18.034cm" svg:y="8.509cm">
          <text:p text:style-name="P1"><text:span text:style-name="T24">Commercial Prep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6" draw:style-name="gr5" draw:text-style-name="P2" draw:layer="layout" svg:width="6.603cm" svg:height="0.634cm" svg:x="18.034cm" svg:y="10.922cm">
          <text:p text:style-name="P1"><text:span text:style-name="T23">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6" draw:style-name="gr5" draw:text-style-name="P2" draw:layer="layout" svg:width="6.603cm" svg:height="3.301cm" svg:x="18.034cm" svg:y="11.557cm">
          <text:p text:style-name="P1"><text:span text:style-name="T20">Playbook + Pricing + Legal + Pitch với các khách hàng tiềm nă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6" draw:style-name="gr5" draw:text-style-name="P2" draw:layer="layout" svg:width="6.603cm" svg:height="0.634cm" svg:x="18.034cm" svg:y="15.113cm">
          <text:p text:style-name="P1"><text:span text:style-name="T23">SUCCESS 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6" draw:style-name="gr5" draw:text-style-name="P2" draw:layer="layout" svg:width="6.603cm" svg:height="1.269cm" svg:x="18.034cm" svg:y="15.748cm">
          <text:p text:style-name="P1"><text:span text:style-name="T29">3-5 prospects commit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6" draw:style-name="gr8" draw:text-style-name="P10" draw:layer="layout" svg:width="7.619cm" svg:height="12.699cm" svg:x="25.527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6" draw:style-name="gr11" draw:text-style-name="P13" draw:layer="layout" svg:width="7.619cm" svg:height="0.38cm" svg:x="25.527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6" draw:style-name="gr5" draw:text-style-name="P2" draw:layer="layout" svg:width="6.603cm" svg:height="1.269cm" svg:x="26.035cm" svg:y="5.334cm">
          <text:p text:style-name="P1"><text:span text:style-name="T30">Q1/2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6" draw:style-name="gr5" draw:text-style-name="P2" draw:layer="layout" svg:width="6.603cm" svg:height="0.761cm" svg:x="26.035cm" svg:y="6.604cm">
          <text:p text:style-name="P1"><text:span text:style-name="T22">T1-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6" draw:style-name="gr9" draw:text-style-name="P11" draw:layer="layout" svg:width="6.603cm" svg:height="0.001cm" svg:x="26.035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6" draw:style-name="gr5" draw:text-style-name="P2" draw:layer="layout" svg:width="6.603cm" svg:height="0.634cm" svg:x="26.035cm" svg:y="7.874cm">
          <text:p text:style-name="P1"><text:span text:style-name="T23">TH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6" draw:style-name="gr5" draw:text-style-name="P2" draw:layer="layout" svg:width="6.603cm" svg:height="1.777cm" svg:x="26.035cm" svg:y="8.509cm">
          <text:p text:style-name="P1"><text:span text:style-name="T24">Free Trial 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6" draw:style-name="gr5" draw:text-style-name="P2" draw:layer="layout" svg:width="6.603cm" svg:height="0.634cm" svg:x="26.035cm" svg:y="10.922cm">
          <text:p text:style-name="P1"><text:span text:style-name="T23">MỤC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6" draw:style-name="gr5" draw:text-style-name="P2" draw:layer="layout" svg:width="6.603cm" svg:height="3.301cm" svg:x="26.035cm" svg:y="11.557cm">
          <text:p text:style-name="P1"><text:span text:style-name="T20">3-5 customers trải nghiệm + Marketing với C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6" draw:style-name="gr5" draw:text-style-name="P2" draw:layer="layout" svg:width="6.603cm" svg:height="0.634cm" svg:x="26.035cm" svg:y="15.113cm">
          <text:p text:style-name="P1"><text:span text:style-name="T23">SUCCESS 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6" draw:style-name="gr5" draw:text-style-name="P2" draw:layer="layout" svg:width="6.603cm" svg:height="1.269cm" svg:x="26.035cm" svg:y="15.748cm">
          <text:p text:style-name="P1"><text:span text:style-name="T31">Free trial running + Marketing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6" draw:style-name="gr1" draw:text-style-name="P2" draw:layer="layout" svg:width="5.079cm" svg:height="0.761cm" svg:x="27.94cm" svg:y="18.034cm">
          <text:p text:style-name="P9"><text:span text:style-name="T12">CASSO ERP Plan | Minh | 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p4:notes" draw:style-name="gr3" draw:layer="layout" svg:width="15.239cm" svg:height="8.572cm" svg:x="1.905cm" svg:y="3.175cm" draw:page-number="4" presentation:class="page"/>
          <draw:frame draw:name="Google Shape;80;p4:notes" presentation:style-name="pr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1;p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5" draw:style-name="dp4" draw:master-page-name="DEFAULT">
        <draw:custom-shape draw:name="Google Shape;135;p7" draw:style-name="gr1" draw:text-style-name="P2" draw:layer="layout" svg:width="30.479cm" svg:height="1.269cm" svg:x="1.524cm" svg:y="1.016cm">
          <text:p text:style-name="P1"><text:span text:style-name="T13">03 — Chi tiết Q2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7" draw:style-name="gr1" draw:text-style-name="P2" draw:layer="layout" svg:width="30.479cm" svg:height="2.031cm" svg:x="1.524cm" svg:y="2.286cm">
          <text:p text:style-name="P1"><text:span text:style-name="T8">Foundation &amp; Go-l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7" draw:style-name="gr1" draw:text-style-name="P2" draw:layer="layout" svg:width="30.479cm" svg:height="1.015cm" svg:x="1.524cm" svg:y="4.318cm">
          <text:p text:style-name="P1"><text:span text:style-name="T32">Tháng 5 — Tháng 6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7" draw:style-name="gr4" draw:text-style-name="P7" draw:layer="layout" svg:width="30.479cm" svg:height="3.047cm" svg:x="1.524cm" svg:y="6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7" draw:style-name="gr1" draw:text-style-name="P2" draw:layer="layout" svg:width="29.209cm" svg:height="0.761cm" svg:x="2.286cm" svg:y="6.477cm">
          <text:p text:style-name="P1"><text:span text:style-name="T33">MỤC TIÊU CHIẾN LƯỢ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7" draw:style-name="gr1" draw:text-style-name="P2" draw:layer="layout" svg:width="29.209cm" svg:height="1.777cm" svg:x="2.286cm" svg:y="7.239cm">
          <text:p text:style-name="P1"><text:span text:style-name="T34">Đưa Viindoo + CASSO API integration go-live thành công cho team kế toán nội bộ CASSO vào 30/6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7" draw:style-name="gr1" draw:text-style-name="P2" draw:layer="layout" svg:width="30.479cm" svg:height="1.269cm" svg:x="1.524cm" svg:y="9.906cm">
          <text:p text:style-name="P1"><text:span text:style-name="T17">3 nghiệp vụ phát triển trong 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7" draw:style-name="gr7" draw:text-style-name="P10" draw:layer="layout" svg:width="10.159cm" svg:height="6.095cm" svg:x="1.524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7" draw:style-name="gr4" draw:text-style-name="P7" draw:layer="layout" svg:width="1.523cm" svg:height="1.523cm" svg:x="1.524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7" draw:style-name="gr1" draw:text-style-name="P2" draw:layer="layout" svg:width="1.523cm" svg:height="1.523cm" svg:x="1.524cm" svg:y="11.684cm">
          <text:p text:style-name="P8"><text:span text:style-name="T3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7" draw:style-name="gr5" draw:text-style-name="P2" draw:layer="layout" svg:width="8.127cm" svg:height="1.015cm" svg:x="3.302cm" svg:y="11.938cm">
          <text:p text:style-name="P1"><text:span text:style-name="T24">API Sao kê tự độ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7" draw:style-name="gr1" draw:text-style-name="P2" draw:layer="layout" svg:width="9.397cm" svg:height="3.809cm" svg:x="2.159cm" svg:y="13.843cm">
          <text:list text:style-name="L33">
            <text:list-item>
              <text:p text:style-name="P14"><text:span text:style-name="T36">Connect ngân hàng VN (MB, VCB, TPBank...)</text:span></text:p>
            </text:list-item>
            <text:list-item>
              <text:p text:style-name="P14"><text:span text:style-name="T36">Auto-pull sao kê real-time</text:span></text:p>
            </text:list-item>
            <text:list-item>
              <text:p text:style-name="P14"><text:span text:style-name="T36">Match transaction → Viindoo journ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7" draw:style-name="gr7" draw:text-style-name="P10" draw:layer="layout" svg:width="10.159cm" svg:height="6.095cm" svg:x="12.192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7" draw:style-name="gr4" draw:text-style-name="P7" draw:layer="layout" svg:width="1.523cm" svg:height="1.523cm" svg:x="12.192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7" draw:style-name="gr1" draw:text-style-name="P2" draw:layer="layout" svg:width="1.523cm" svg:height="1.523cm" svg:x="12.192cm" svg:y="11.684cm">
          <text:p text:style-name="P8"><text:span text:style-name="T3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7" draw:style-name="gr5" draw:text-style-name="P2" draw:layer="layout" svg:width="8.127cm" svg:height="1.015cm" svg:x="13.97cm" svg:y="11.938cm">
          <text:p text:style-name="P1"><text:span text:style-name="T24">API Hóa đơn điện t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7" draw:style-name="gr1" draw:text-style-name="P2" draw:layer="layout" svg:width="9.397cm" svg:height="3.809cm" svg:x="12.827cm" svg:y="13.843cm">
          <text:list text:style-name="L33">
            <text:list-item>
              <text:p text:style-name="P14"><text:span text:style-name="T36">Kéo hóa đơn từ Tổng cục Thuế</text:span></text:p>
            </text:list-item>
            <text:list-item>
              <text:p text:style-name="P14"><text:span text:style-name="T36">Validation rules tự động</text:span></text:p>
            </text:list-item>
            <text:list-item>
              <text:p text:style-name="P14"><text:span text:style-name="T36">Sync với Viindoo Accoun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7" draw:style-name="gr7" draw:text-style-name="P10" draw:layer="layout" svg:width="10.159cm" svg:height="6.095cm" svg:x="22.86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7" draw:style-name="gr4" draw:text-style-name="P7" draw:layer="layout" svg:width="1.523cm" svg:height="1.523cm" svg:x="22.86cm" svg:y="11.6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7" draw:style-name="gr1" draw:text-style-name="P2" draw:layer="layout" svg:width="1.523cm" svg:height="1.523cm" svg:x="22.86cm" svg:y="11.684cm">
          <text:p text:style-name="P8"><text:span text:style-name="T3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7" draw:style-name="gr5" draw:text-style-name="P2" draw:layer="layout" svg:width="8.127cm" svg:height="1.015cm" svg:x="24.638cm" svg:y="11.938cm">
          <text:p text:style-name="P1"><text:span text:style-name="T24">API Chữ ký số (C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7" draw:style-name="gr1" draw:text-style-name="P2" draw:layer="layout" svg:width="9.397cm" svg:height="3.809cm" svg:x="23.495cm" svg:y="13.843cm">
          <text:list text:style-name="L33">
            <text:list-item>
              <text:p text:style-name="P14"><text:span text:style-name="T36">Integrate Viettel-CA/VNPT-CA</text:span></text:p>
            </text:list-item>
            <text:list-item>
              <text:p text:style-name="P14"><text:span text:style-name="T36">Auto-sign workflow</text:span></text:p>
            </text:list-item>
            <text:list-item>
              <text:p text:style-name="P14"><text:span text:style-name="T36">End-to-end document f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7" draw:style-name="gr1" draw:text-style-name="P2" draw:layer="layout" svg:width="5.079cm" svg:height="0.761cm" svg:x="27.94cm" svg:y="18.034cm">
          <text:p text:style-name="P9"><text:span text:style-name="T12">CASSO ERP Plan | Minh | 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p5:notes" draw:style-name="gr3" draw:layer="layout" svg:width="15.239cm" svg:height="8.572cm" svg:x="1.905cm" svg:y="3.175cm" draw:page-number="5" presentation:class="page"/>
          <draw:frame draw:name="Google Shape;132;p5:notes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;p5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163;p8" draw:style-name="gr1" draw:text-style-name="P2" draw:layer="layout" svg:width="30.479cm" svg:height="1.269cm" svg:x="1.524cm" svg:y="1.016cm">
          <text:p text:style-name="P1"><text:span text:style-name="T13">03 — Chi tiết Q2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8" draw:style-name="gr1" draw:text-style-name="P2" draw:layer="layout" svg:width="30.479cm" svg:height="1.777cm" svg:x="1.524cm" svg:y="2.286cm">
          <text:p text:style-name="P1"><text:span text:style-name="T37">Lộ trình 8 tuần — T5 đến 30/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8" draw:style-name="standard" draw:layer="layout" svg:width="30.732cm" svg:height="11.712cm" svg:x="1.524cm" svg:y="4.5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38">TUẦN</text:span></text:p>
              </table:table-cell>
              <table:table-cell>
                <text:p text:style-name="P1"><text:span text:style-name="T38">DATE</text:span></text:p>
              </table:table-cell>
              <table:table-cell>
                <text:p text:style-name="P1"><text:span text:style-name="T38">FOCUS</text:span></text:p>
              </table:table-cell>
              <table:table-cell>
                <text:p text:style-name="P1"><text:span text:style-name="T38">DELIVERABLES CHÍNH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9">T5-W1</text:span></text:p>
              </table:table-cell>
              <table:table-cell>
                <text:p text:style-name="P1"><text:span text:style-name="T40">5-11/5</text:span></text:p>
              </table:table-cell>
              <table:table-cell>
                <text:p text:style-name="P1"><text:span text:style-name="T40">Discovery + Pitch</text:span></text:p>
              </table:table-cell>
              <table:table-cell>
                <text:p text:style-name="P1"><text:span text:style-name="T40">Nghiên cứu workflow nghiệp vụ kế toán, Pain Point Matrix, Viindoo training, Tech Requirements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9">T5-W2</text:span></text:p>
              </table:table-cell>
              <table:table-cell>
                <text:p text:style-name="P1"><text:span text:style-name="T40">12-18/5</text:span></text:p>
              </table:table-cell>
              <table:table-cell>
                <text:p text:style-name="P1"><text:span text:style-name="T40">Design + Align</text:span></text:p>
              </table:table-cell>
              <table:table-cell>
                <text:list text:style-name="L37">
                  <text:list-item>
                    <text:p text:style-name="P14"><text:span text:style-name="T40">Nghiên cứu chi tiết luồng nghiệp vụ hạch toán của Odoo Accounting</text:span></text:p>
                  </text:list-item>
                  <text:list-item>
                    <text:p text:style-name="P14"><text:span text:style-name="T40">Nghiên cứu flow hạch toán chứng từ sao kê của Viindoo Acconting</text:span></text:p>
                  </text:list-item>
                  <text:list-item>
                    <text:p text:style-name="P14"><text:span text:style-name="T40">Spec kết nối và kéo sao kê ngân hàng để hạch toán (đối trừ chứng từ) =&gt; Kế thừa các ông lớn đi trước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1"><text:span text:style-name="T39">T5-W3</text:span></text:p>
              </table:table-cell>
              <table:table-cell>
                <text:p text:style-name="P1"><text:span text:style-name="T40">19-25/5</text:span></text:p>
              </table:table-cell>
              <table:table-cell>
                <text:p text:style-name="P1"><text:span text:style-name="T40">Build Sprint 1</text:span></text:p>
              </table:table-cell>
              <table:table-cell>
                <text:list text:continue-numbering="true" text:style-name="L37">
                  <text:list-item>
                    <text:p text:style-name="P14"><text:span text:style-name="T40">Spec kéo sao kê cục thuế và hạch toán hoá đơn (tạo chứng từ)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1"><text:span text:style-name="T39">T5-W4</text:span></text:p>
              </table:table-cell>
              <table:table-cell>
                <text:p text:style-name="P1"><text:span text:style-name="T40">26/5-1/6</text:span></text:p>
              </table:table-cell>
              <table:table-cell>
                <text:p text:style-name="P1"><text:span text:style-name="T40">Build Sprint 2</text:span></text:p>
              </table:table-cell>
              <table:table-cell>
                <text:list text:continue-numbering="true" text:style-name="L37">
                  <text:list-item>
                    <text:p text:style-name="P14"><text:span text:style-name="T40">Nghiên cứu nghiệp vụ “tạo hoá đơn điện tử" của </text:span></text:p>
                  </text:list-item>
                  <text:list-item>
                    <text:p text:style-name="P14"><text:span text:style-name="T40">Spec tạo hoá đơn điện tử và ký chứng thư số (đẩy hoá đơn lên thuế)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1"><text:span text:style-name="T39">T6-W1</text:span></text:p>
              </table:table-cell>
              <table:table-cell>
                <text:p text:style-name="P1"><text:span text:style-name="T40">2-8/6</text:span></text:p>
              </table:table-cell>
              <table:table-cell>
                <text:p text:style-name="P1"><text:span text:style-name="T40">Hardening</text:span></text:p>
              </table:table-cell>
              <table:table-cell>
                <text:p text:style-name="P1"><text:span text:style-name="T40">Bug fixing, End-to-end flow QC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39">T6-W2</text:span></text:p>
              </table:table-cell>
              <table:table-cell>
                <text:p text:style-name="P1"><text:span text:style-name="T40">9-15/6</text:span></text:p>
              </table:table-cell>
              <table:table-cell>
                <text:p text:style-name="P1"><text:span text:style-name="T40">Parallel Run</text:span></text:p>
              </table:table-cell>
              <table:table-cell>
                <text:p text:style-name="P1"><text:span text:style-name="T40">Setup parallel run, ROI tracking, Mid-month review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9">T6-W3</text:span></text:p>
              </table:table-cell>
              <table:table-cell>
                <text:p text:style-name="P1"><text:span text:style-name="T40">16-22/6</text:span></text:p>
              </table:table-cell>
              <table:table-cell>
                <text:p text:style-name="P1"><text:span text:style-name="T40">Pre Go-live</text:span></text:p>
              </table:table-cell>
              <table:table-cell>
                <text:p text:style-name="P1"><text:span text:style-name="T40">UAT, Data migration dress rehearsal, Readiness checklist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41">T6-W4</text:span></text:p>
              </table:table-cell>
              <table:table-cell>
                <text:p text:style-name="P1"><text:span text:style-name="T41">23-30/6</text:span></text:p>
              </table:table-cell>
              <table:table-cell>
                <text:p text:style-name="P1"><text:span text:style-name="T41">🚀 </text:span><text:span text:style-name="T41">GO-LIVE</text:span></text:p>
              </table:table-cell>
              <table:table-cell>
                <text:p text:style-name="P1"><text:span text:style-name="T41">Mock 26/6, GO-LIVE 30/6, Hyper-care Day 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66;p8" draw:style-name="gr12" draw:text-style-name="P15" draw:layer="layout" svg:width="30.479cm" svg:height="1.269cm" svg:x="1.524cm" svg:y="16.63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8" draw:style-name="gr1" draw:text-style-name="P2" draw:layer="layout" svg:width="29.971cm" svg:height="1.269cm" svg:x="2.032cm" svg:y="16.637cm">
          <text:p text:style-name="P1"><text:span text:style-name="T42">⚠️ <text:s/></text:span><text:span text:style-name="T42">CRITICAL: </text:span><text:span text:style-name="T36">Cuộc nói chuyện tuần T5-W2 với anh Điệp là milestone foundation. GO-LIVE 30/6 là deadline cứng - không được tr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8" draw:style-name="gr1" draw:text-style-name="P2" draw:layer="layout" svg:width="5.079cm" svg:height="0.761cm" svg:x="27.94cm" svg:y="18.034cm">
          <text:p text:style-name="P9"><text:span text:style-name="T12">CASSO ERP Plan | Minh | 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p6:notes" draw:style-name="gr3" draw:layer="layout" svg:width="15.239cm" svg:height="8.572cm" svg:x="1.905cm" svg:y="3.175cm" draw:page-number="6" presentation:class="page"/>
          <draw:frame draw:name="Google Shape;160;p6:notes" presentation:style-name="pr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61;p6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7" draw:style-name="dp4" draw:master-page-name="DEFAULT">
        <draw:custom-shape draw:name="Google Shape;174;p9" draw:style-name="gr1" draw:text-style-name="P2" draw:layer="layout" svg:width="30.479cm" svg:height="1.269cm" svg:x="1.524cm" svg:y="1.016cm">
          <text:p text:style-name="P1"><text:span text:style-name="T13">04 — Chi tiết Q3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9" draw:style-name="gr1" draw:text-style-name="P2" draw:layer="layout" svg:width="30.479cm" svg:height="2.031cm" svg:x="1.524cm" svg:y="2.286cm">
          <text:p text:style-name="P1"><text:span text:style-name="T8">Stabilization &amp; Product E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9" draw:style-name="gr1" draw:text-style-name="P2" draw:layer="layout" svg:width="30.479cm" svg:height="1.015cm" svg:x="1.524cm" svg:y="4.318cm">
          <text:p text:style-name="P1"><text:span text:style-name="T32">Tháng 7 — Tháng 9,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9" draw:style-name="gr1" draw:text-style-name="P2" draw:layer="layout" svg:width="30.479cm" svg:height="1.269cm" svg:x="1.524cm" svg:y="5.842cm">
          <text:p text:style-name="P1"><text:span text:style-name="T17">3 mục tiêu chiến lược của 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9" draw:style-name="gr7" draw:text-style-name="P10" draw:layer="layout" svg:width="30.479cm" svg:height="3.047cm" svg:x="1.524cm" svg:y="7.6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9" draw:style-name="gr2" draw:text-style-name="P3" draw:layer="layout" svg:width="1.777cm" svg:height="1.777cm" svg:x="2.159cm" svg:y="8.25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9" draw:style-name="gr1" draw:text-style-name="P2" draw:layer="layout" svg:width="1.777cm" svg:height="1.777cm" svg:x="2.159cm" svg:y="8.255cm">
          <text:p text:style-name="P8"><text:span text:style-name="T3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9" draw:style-name="gr5" draw:text-style-name="P2" draw:layer="layout" svg:width="26.669cm" svg:height="1.015cm" svg:x="4.445cm" svg:y="8.128cm">
          <text:p text:style-name="P1"><text:span text:style-name="T43">Stabilize &amp; Measure RO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9" draw:style-name="gr5" draw:text-style-name="P2" draw:layer="layout" svg:width="26.669cm" svg:height="1.523cm" svg:x="4.445cm" svg:y="9.144cm">
          <text:p text:style-name="P1"><text:span text:style-name="T20">Hyper-care nội bộ, đo lường thời gian tiết kiệm, sai sót giảm. Output: ROI Case Study v1 với data thậ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9" draw:style-name="gr7" draw:text-style-name="P10" draw:layer="layout" svg:width="30.479cm" svg:height="3.047cm" svg:x="1.524cm" svg:y="11.04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9" draw:style-name="gr2" draw:text-style-name="P3" draw:layer="layout" svg:width="1.777cm" svg:height="1.777cm" svg:x="2.159cm" svg:y="11.68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9" draw:style-name="gr1" draw:text-style-name="P2" draw:layer="layout" svg:width="1.777cm" svg:height="1.777cm" svg:x="2.159cm" svg:y="11.684cm">
          <text:p text:style-name="P8"><text:span text:style-name="T3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9" draw:style-name="gr5" draw:text-style-name="P2" draw:layer="layout" svg:width="26.669cm" svg:height="1.015cm" svg:x="4.445cm" svg:y="11.557cm">
          <text:p text:style-name="P1"><text:span text:style-name="T43">Product E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9" draw:style-name="gr5" draw:text-style-name="P2" draw:layer="layout" svg:width="26.669cm" svg:height="1.523cm" svg:x="4.445cm" svg:y="12.573cm">
          <text:p text:style-name="P1"><text:span text:style-name="T20">Phát triển các nghiệp vụ ERP còn thiếu để chuẩn bị commercial: Banking deep, Tax, Expense, HR, Digital Sig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9" draw:style-name="gr7" draw:text-style-name="P10" draw:layer="layout" svg:width="30.479cm" svg:height="3.047cm" svg:x="1.524cm" svg:y="14.47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9" draw:style-name="gr2" draw:text-style-name="P3" draw:layer="layout" svg:width="1.777cm" svg:height="1.777cm" svg:x="2.159cm" svg:y="15.11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0;p9" draw:style-name="gr1" draw:text-style-name="P2" draw:layer="layout" svg:width="1.777cm" svg:height="1.777cm" svg:x="2.159cm" svg:y="15.113cm">
          <text:p text:style-name="P8"><text:span text:style-name="T3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9" draw:style-name="gr5" draw:text-style-name="P2" draw:layer="layout" svg:width="26.669cm" svg:height="1.015cm" svg:x="4.445cm" svg:y="14.986cm">
          <text:p text:style-name="P1"><text:span text:style-name="T43">Viindoo Partnership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9" draw:style-name="gr5" draw:text-style-name="P2" draw:layer="layout" svg:width="26.669cm" svg:height="1.523cm" svg:x="4.445cm" svg:y="16.002cm">
          <text:p text:style-name="P1"><text:span text:style-name="T20">Đánh giá khả năng hợp tác với Viindoo. Strategic decision: Partner/Reseller model vs Standalone Odoo buil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9" draw:style-name="gr1" draw:text-style-name="P2" draw:layer="layout" svg:width="5.079cm" svg:height="0.761cm" svg:x="27.94cm" svg:y="18.034cm">
          <text:p text:style-name="P9"><text:span text:style-name="T12">CASSO ERP Plan | Minh | 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p7:notes" draw:style-name="gr3" draw:layer="layout" svg:width="15.239cm" svg:height="8.572cm" svg:x="1.905cm" svg:y="3.175cm" draw:page-number="7" presentation:class="page"/>
          <draw:frame draw:name="Google Shape;171;p7:notes" presentation:style-name="pr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2;p7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199;p10" draw:style-name="gr1" draw:text-style-name="P2" draw:layer="layout" svg:width="30.479cm" svg:height="1.269cm" svg:x="1.524cm" svg:y="1.016cm">
          <text:p text:style-name="P1"><text:span text:style-name="T13">04 — Chi tiết Q3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0" draw:style-name="gr1" draw:text-style-name="P2" draw:layer="layout" svg:width="30.479cm" svg:height="1.777cm" svg:x="1.524cm" svg:y="2.286cm">
          <text:p text:style-name="P1"><text:span text:style-name="T37">5 nghiệp vụ phát triển trong 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0" draw:style-name="gr1" draw:text-style-name="P2" draw:layer="layout" svg:width="30.479cm" svg:height="1.015cm" svg:x="1.524cm" svg:y="4.064cm">
          <text:p text:style-name="P1"><text:span text:style-name="T44">Mở rộng từ foundation Q2 sang hệ sinh thái ERP đầy đủ cho commercial 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0" draw:style-name="gr7" draw:text-style-name="P10" draw:layer="layout" svg:width="10.159cm" svg:height="6.095cm" svg:x="1.524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0" draw:style-name="gr4" draw:text-style-name="P7" draw:layer="layout" svg:width="10.159cm" svg:height="0.253cm" svg:x="1.524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0" draw:style-name="gr5" draw:text-style-name="P2" draw:layer="layout" svg:width="8.889cm" svg:height="1.015cm" svg:x="2.159cm" svg:y="6.096cm">
          <text:p text:style-name="P1"><text:span text:style-name="T15">Banking nâng c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0" draw:style-name="gr5" draw:text-style-name="P2" draw:layer="layout" svg:width="8.889cm" svg:height="0.761cm" svg:x="2.159cm" svg:y="7.112cm">
          <text:p text:style-name="P1"><text:span text:style-name="T45">Mở rộng từ API sao kê 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0" draw:style-name="gr1" draw:text-style-name="P2" draw:layer="layout" svg:width="9.397cm" svg:height="3.555cm" svg:x="2.159cm" svg:y="8.128cm">
          <text:list text:style-name="L33">
            <text:list-item>
              <text:p text:style-name="P14"><text:span text:style-name="T36">Auto-reconciliation rules engine</text:span></text:p>
            </text:list-item>
            <text:list-item>
              <text:p text:style-name="P14"><text:span text:style-name="T36">Multi-bank dashboard</text:span></text:p>
            </text:list-item>
            <text:list-item>
              <text:p text:style-name="P14"><text:span text:style-name="T36">Cash flow foreca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0" draw:style-name="gr7" draw:text-style-name="P10" draw:layer="layout" svg:width="10.159cm" svg:height="6.095cm" svg:x="12.192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0" draw:style-name="gr2" draw:text-style-name="P3" draw:layer="layout" svg:width="10.159cm" svg:height="0.253cm" svg:x="12.192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0" draw:style-name="gr5" draw:text-style-name="P2" draw:layer="layout" svg:width="8.889cm" svg:height="1.015cm" svg:x="12.827cm" svg:y="6.096cm">
          <text:p text:style-name="P1"><text:span text:style-name="T46">Thuế tự độ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0" draw:style-name="gr5" draw:text-style-name="P2" draw:layer="layout" svg:width="8.889cm" svg:height="0.761cm" svg:x="12.827cm" svg:y="7.112cm">
          <text:p text:style-name="P1"><text:span text:style-name="T45">Mở rộng từ hóa đơn ĐT 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0" draw:style-name="gr1" draw:text-style-name="P2" draw:layer="layout" svg:width="9.397cm" svg:height="3.555cm" svg:x="12.827cm" svg:y="8.128cm">
          <text:list text:style-name="L33">
            <text:list-item>
              <text:p text:style-name="P14"><text:span text:style-name="T36">E-invoice issuance automation</text:span></text:p>
            </text:list-item>
            <text:list-item>
              <text:p text:style-name="P14"><text:span text:style-name="T36">VAT report automation</text:span></text:p>
            </text:list-item>
            <text:list-item>
              <text:p text:style-name="P14"><text:span text:style-name="T36">Tax filing reminder &amp; workf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0" draw:style-name="gr7" draw:text-style-name="P10" draw:layer="layout" svg:width="10.159cm" svg:height="6.095cm" svg:x="22.86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0" draw:style-name="gr10" draw:text-style-name="P12" draw:layer="layout" svg:width="10.159cm" svg:height="0.253cm" svg:x="22.86cm" svg:y="5.58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0" draw:style-name="gr5" draw:text-style-name="P2" draw:layer="layout" svg:width="8.889cm" svg:height="1.015cm" svg:x="23.495cm" svg:y="6.096cm">
          <text:p text:style-name="P1"><text:span text:style-name="T47">Chữ ký số nâng c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0" draw:style-name="gr5" draw:text-style-name="P2" draw:layer="layout" svg:width="8.889cm" svg:height="0.761cm" svg:x="23.495cm" svg:y="7.112cm">
          <text:p text:style-name="P1"><text:span text:style-name="T45">Mở rộng từ CA integration 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0" draw:style-name="gr1" draw:text-style-name="P2" draw:layer="layout" svg:width="9.397cm" svg:height="3.555cm" svg:x="23.495cm" svg:y="8.128cm">
          <text:list text:style-name="L33">
            <text:list-item>
              <text:p text:style-name="P14"><text:span text:style-name="T36">Multi-document signing</text:span></text:p>
            </text:list-item>
            <text:list-item>
              <text:p text:style-name="P14"><text:span text:style-name="T36">Approval workflow + ký số</text:span></text:p>
            </text:list-item>
            <text:list-item>
              <text:p text:style-name="P14"><text:span text:style-name="T36">Audit trail compli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0" draw:style-name="gr7" draw:text-style-name="P10" draw:layer="layout" svg:width="10.159cm" svg:height="6.095cm" svg:x="1.524cm" svg:y="12.0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0" draw:style-name="gr13" draw:text-style-name="P16" draw:layer="layout" svg:width="10.159cm" svg:height="0.253cm" svg:x="1.524cm" svg:y="12.0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0" draw:style-name="gr5" draw:text-style-name="P2" draw:layer="layout" svg:width="8.889cm" svg:height="1.015cm" svg:x="2.159cm" svg:y="12.573cm">
          <text:p text:style-name="P1"><text:span text:style-name="T48">Quản lý chi tiê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0" draw:style-name="gr5" draw:text-style-name="P2" draw:layer="layout" svg:width="8.889cm" svg:height="0.761cm" svg:x="2.159cm" svg:y="13.589cm">
          <text:p text:style-name="P1"><text:span text:style-name="T45">Mới - cho doanh nghiệ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0" draw:style-name="gr1" draw:text-style-name="P2" draw:layer="layout" svg:width="9.397cm" svg:height="3.555cm" svg:x="2.159cm" svg:y="14.605cm">
          <text:list text:style-name="L33">
            <text:list-item>
              <text:p text:style-name="P14"><text:span text:style-name="T36">Expense management</text:span></text:p>
            </text:list-item>
            <text:list-item>
              <text:p text:style-name="P14"><text:span text:style-name="T36">Approval workflow</text:span></text:p>
            </text:list-item>
            <text:list-item>
              <text:p text:style-name="P14"><text:span text:style-name="T36">Reimbursement + petty cas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0" draw:style-name="gr7" draw:text-style-name="P10" draw:layer="layout" svg:width="10.159cm" svg:height="6.095cm" svg:x="12.192cm" svg:y="12.0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0" draw:style-name="gr11" draw:text-style-name="P13" draw:layer="layout" svg:width="10.159cm" svg:height="0.253cm" svg:x="12.192cm" svg:y="12.0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0" draw:style-name="gr5" draw:text-style-name="P2" draw:layer="layout" svg:width="8.889cm" svg:height="1.015cm" svg:x="12.827cm" svg:y="12.573cm">
          <text:p text:style-name="P1"><text:span text:style-name="T49">Nhân sự cơ bả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0" draw:style-name="gr5" draw:text-style-name="P2" draw:layer="layout" svg:width="8.889cm" svg:height="0.761cm" svg:x="12.827cm" svg:y="13.589cm">
          <text:p text:style-name="P1"><text:span text:style-name="T45">Mới - HR + Payro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0" draw:style-name="gr1" draw:text-style-name="P2" draw:layer="layout" svg:width="9.397cm" svg:height="3.555cm" svg:x="12.827cm" svg:y="14.605cm">
          <text:list text:style-name="L33">
            <text:list-item>
              <text:p text:style-name="P14"><text:span text:style-name="T36">Employee master data</text:span></text:p>
            </text:list-item>
            <text:list-item>
              <text:p text:style-name="P14"><text:span text:style-name="T36">Payroll integration accounting</text:span></text:p>
            </text:list-item>
            <text:list-item>
              <text:p text:style-name="P14"><text:span text:style-name="T36">Salary disbursement qua bank AP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0" draw:style-name="gr1" draw:text-style-name="P2" draw:layer="layout" svg:width="5.079cm" svg:height="0.761cm" svg:x="27.94cm" svg:y="18.034cm">
          <text:p text:style-name="P9"><text:span text:style-name="T12">CASSO ERP Plan | Minh | 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p8:notes" draw:style-name="gr3" draw:layer="layout" svg:width="15.239cm" svg:height="8.572cm" svg:x="1.905cm" svg:y="3.175cm" draw:page-number="8" presentation:class="page"/>
          <draw:frame draw:name="Google Shape;196;p8:notes" presentation:style-name="pr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97;p8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233;p11" draw:style-name="gr1" draw:text-style-name="P2" draw:layer="layout" svg:width="30.479cm" svg:height="1.269cm" svg:x="1.524cm" svg:y="1.016cm">
          <text:p text:style-name="P1"><text:span text:style-name="T13">04 — Chi tiết Q3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1" draw:style-name="gr1" draw:text-style-name="P2" draw:layer="layout" svg:width="30.479cm" svg:height="1.777cm" svg:x="1.524cm" svg:y="2.286cm">
          <text:p text:style-name="P1"><text:span text:style-name="T37">Lộ trình 3 tháng — 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1" draw:style-name="gr8" draw:text-style-name="P10" draw:layer="layout" svg:width="10.159cm" svg:height="12.699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1" draw:style-name="gr2" draw:text-style-name="P3" draw:layer="layout" svg:width="10.159cm" svg:height="1.523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1" draw:style-name="gr5" draw:text-style-name="P2" draw:layer="layout" svg:width="9.143cm" svg:height="1.523cm" svg:x="2.032cm" svg:y="4.572cm">
          <text:p text:style-name="P1"><text:span text:style-name="T9">Tháng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1" draw:style-name="gr5" draw:text-style-name="P2" draw:layer="layout" svg:width="9.143cm" svg:height="1.523cm" svg:x="2.032cm" svg:y="6.477cm">
          <text:p text:style-name="P1"><text:span text:style-name="T50">Stabilization + ROI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1" draw:style-name="gr9" draw:text-style-name="P11" draw:layer="layout" svg:width="9.143cm" svg:height="0.001cm" svg:x="2.032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11" draw:style-name="gr5" draw:text-style-name="P2" draw:layer="layout" svg:width="9.143cm" svg:height="0.634cm" svg:x="2.032cm" svg:y="8.255cm">
          <text:p text:style-name="P1"><text:span text:style-name="T23">DELIVE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11" draw:style-name="gr1" draw:text-style-name="P2" draw:layer="layout" svg:width="9.397cm" svg:height="6.095cm" svg:x="2.032cm" svg:y="9.017cm">
          <text:list text:style-name="L47">
            <text:list-item>
              <text:p text:style-name="P14"><text:span text:style-name="T51">Hyper-care kế toán nội bộ (response &lt;4h)</text:span></text:p>
            </text:list-item>
            <text:list-item>
              <text:p text:style-name="P14"><text:span text:style-name="T51">Bug fixing systematic + Performance optimization</text:span></text:p>
            </text:list-item>
            <text:list-item>
              <text:p text:style-name="P14"><text:span text:style-name="T51">User Guide v1, Admin Guide v1, Troubleshooting Playbook</text:span></text:p>
            </text:list-item>
            <text:list-item>
              <text:p text:style-name="P14"><text:span text:style-name="T51">Setup ROI Measurement Framework</text:span></text:p>
            </text:list-item>
            <text:list-item>
              <text:p text:style-name="P14"><text:span text:style-name="T51">Baseline vs Current comparis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11" draw:style-name="gr14" draw:text-style-name="P15" draw:layer="layout" svg:width="9.397cm" svg:height="1.523cm" svg:x="1.905cm" svg:y="15.4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1" draw:style-name="gr5" draw:text-style-name="P2" draw:layer="layout" svg:width="8.889cm" svg:height="0.507cm" svg:x="2.159cm" svg:y="15.494cm">
          <text:p text:style-name="P1"><text:span text:style-name="T52">DECISION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11" draw:style-name="gr5" draw:text-style-name="P2" draw:layer="layout" svg:width="8.889cm" svg:height="1.015cm" svg:x="2.159cm" svg:y="16.002cm">
          <text:p text:style-name="P1"><text:span text:style-name="T51">Priority list cho product enhan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11" draw:style-name="gr8" draw:text-style-name="P10" draw:layer="layout" svg:width="10.159cm" svg:height="12.699cm" svg:x="12.192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11" draw:style-name="gr2" draw:text-style-name="P3" draw:layer="layout" svg:width="10.159cm" svg:height="1.523cm" svg:x="12.192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11" draw:style-name="gr5" draw:text-style-name="P2" draw:layer="layout" svg:width="9.143cm" svg:height="1.523cm" svg:x="12.7cm" svg:y="4.572cm">
          <text:p text:style-name="P1"><text:span text:style-name="T9">Tháng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11" draw:style-name="gr5" draw:text-style-name="P2" draw:layer="layout" svg:width="9.143cm" svg:height="1.523cm" svg:x="12.7cm" svg:y="6.477cm">
          <text:p text:style-name="P1"><text:span text:style-name="T50">Product Sprint + Viindoo Discu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11" draw:style-name="gr9" draw:text-style-name="P11" draw:layer="layout" svg:width="9.143cm" svg:height="0.001cm" svg:x="12.7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11" draw:style-name="gr5" draw:text-style-name="P2" draw:layer="layout" svg:width="9.143cm" svg:height="0.634cm" svg:x="12.7cm" svg:y="8.255cm">
          <text:p text:style-name="P1"><text:span text:style-name="T23">DELIVE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11" draw:style-name="gr1" draw:text-style-name="P2" draw:layer="layout" svg:width="9.397cm" svg:height="6.095cm" svg:x="12.7cm" svg:y="9.017cm">
          <text:list text:style-name="L47">
            <text:list-item>
              <text:p text:style-name="P14"><text:span text:style-name="T51">Sprint Banking + Tax features</text:span></text:p>
            </text:list-item>
            <text:list-item>
              <text:p text:style-name="P14"><text:span text:style-name="T51">ROI Case Study v1 (data thật từ team kế toán CASSO)</text:span></text:p>
            </text:list-item>
            <text:list-item>
              <text:p text:style-name="P14"><text:span text:style-name="T51">Initial discussion với Viindoo về partnership models</text:span></text:p>
            </text:list-item>
            <text:list-item>
              <text:p text:style-name="P14"><text:span text:style-name="T51">Competitive analysis (MISA AMIS, Bravo, Fast)</text:span></text:p>
            </text:list-item>
            <text:list-item>
              <text:p text:style-name="P14"><text:span text:style-name="T51">Pricing 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11" draw:style-name="gr14" draw:text-style-name="P15" draw:layer="layout" svg:width="9.397cm" svg:height="1.523cm" svg:x="12.573cm" svg:y="15.4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11" draw:style-name="gr5" draw:text-style-name="P2" draw:layer="layout" svg:width="8.889cm" svg:height="0.507cm" svg:x="12.827cm" svg:y="15.494cm">
          <text:p text:style-name="P1"><text:span text:style-name="T52">DECISION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1" draw:style-name="gr5" draw:text-style-name="P2" draw:layer="layout" svg:width="8.889cm" svg:height="1.015cm" svg:x="12.827cm" svg:y="16.002cm">
          <text:p text:style-name="P1"><text:span text:style-name="T51">Mô hình hợp tác Viindoo (Partner/Reseller vs Standalo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1" draw:style-name="gr8" draw:text-style-name="P10" draw:layer="layout" svg:width="10.159cm" svg:height="12.699cm" svg:x="22.86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11" draw:style-name="gr2" draw:text-style-name="P3" draw:layer="layout" svg:width="10.159cm" svg:height="1.523cm" svg:x="22.86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11" draw:style-name="gr5" draw:text-style-name="P2" draw:layer="layout" svg:width="9.143cm" svg:height="1.523cm" svg:x="23.368cm" svg:y="4.572cm">
          <text:p text:style-name="P1"><text:span text:style-name="T9">Tháng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11" draw:style-name="gr5" draw:text-style-name="P2" draw:layer="layout" svg:width="9.143cm" svg:height="1.523cm" svg:x="23.368cm" svg:y="6.477cm">
          <text:p text:style-name="P1"><text:span text:style-name="T50">Features Continued + Partnership Fin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11" draw:style-name="gr9" draw:text-style-name="P11" draw:layer="layout" svg:width="9.143cm" svg:height="0.001cm" svg:x="23.368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11" draw:style-name="gr5" draw:text-style-name="P2" draw:layer="layout" svg:width="9.143cm" svg:height="0.634cm" svg:x="23.368cm" svg:y="8.255cm">
          <text:p text:style-name="P1"><text:span text:style-name="T23">DELIVE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11" draw:style-name="gr1" draw:text-style-name="P2" draw:layer="layout" svg:width="9.397cm" svg:height="6.095cm" svg:x="23.368cm" svg:y="9.017cm">
          <text:list text:style-name="L47">
            <text:list-item>
              <text:p text:style-name="P14"><text:span text:style-name="T51">Sprint Expense Management + HR + Digital Sign</text:span></text:p>
            </text:list-item>
            <text:list-item>
              <text:p text:style-name="P14"><text:span text:style-name="T51">Viindoo partnership signed in principle</text:span></text:p>
            </text:list-item>
            <text:list-item>
              <text:p text:style-name="P14"><text:span text:style-name="T51">Legal/IP framework discussion</text:span></text:p>
            </text:list-item>
            <text:list-item>
              <text:p text:style-name="P14"><text:span text:style-name="T51">Q3 Retrospective</text:span></text:p>
            </text:list-item>
            <text:list-item>
              <text:p text:style-name="P14"><text:span text:style-name="T51">Q4 Detailed Plan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11" draw:style-name="gr14" draw:text-style-name="P15" draw:layer="layout" svg:width="9.397cm" svg:height="1.523cm" svg:x="23.241cm" svg:y="15.4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11" draw:style-name="gr5" draw:text-style-name="P2" draw:layer="layout" svg:width="8.889cm" svg:height="0.507cm" svg:x="23.495cm" svg:y="15.494cm">
          <text:p text:style-name="P1"><text:span text:style-name="T52">DECISION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11" draw:style-name="gr5" draw:text-style-name="P2" draw:layer="layout" svg:width="8.889cm" svg:height="1.015cm" svg:x="23.495cm" svg:y="16.002cm">
          <text:p text:style-name="P1"><text:span text:style-name="T51">Final partnership terms + Legal structure commer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11" draw:style-name="gr1" draw:text-style-name="P2" draw:layer="layout" svg:width="5.079cm" svg:height="0.761cm" svg:x="27.94cm" svg:y="18.034cm">
          <text:p text:style-name="P9"><text:span text:style-name="T12">CASSO ERP Plan | Minh | 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p9:notes" draw:style-name="gr3" draw:layer="layout" svg:width="15.239cm" svg:height="8.572cm" svg:x="1.905cm" svg:y="3.175cm" draw:page-number="9" presentation:class="page"/>
          <draw:frame draw:name="Google Shape;230;p9:notes" presentation:style-name="pr1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31;p9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10" draw:style-name="dp4" draw:master-page-name="DEFAULT">
        <draw:custom-shape draw:name="Google Shape;271;p12" draw:style-name="gr1" draw:text-style-name="P2" draw:layer="layout" svg:width="30.479cm" svg:height="1.269cm" svg:x="1.524cm" svg:y="1.016cm">
          <text:p text:style-name="P1"><text:span text:style-name="T13">05 — Resource &amp;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2" draw:style-name="gr1" draw:text-style-name="P2" draw:layer="layout" svg:width="30.479cm" svg:height="1.777cm" svg:x="1.524cm" svg:y="2.286cm">
          <text:p text:style-name="P1"><text:span text:style-name="T37">Resource cần để execute kế hoạ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12" draw:style-name="standard" draw:layer="layout" svg:width="30.732cm" svg:height="8.126cm" svg:x="1.524cm" svg:y="4.572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8"><text:span text:style-name="T38">ROLE</text:span></text:p>
              </table:table-cell>
              <table:table-cell>
                <text:p text:style-name="P8"><text:span text:style-name="T38">Q2 (T5-T6)</text:span></text:p>
              </table:table-cell>
              <table:table-cell>
                <text:p text:style-name="P8"><text:span text:style-name="T38">Q3 (T7-T9)</text:span></text:p>
              </table:table-cell>
              <table:table-cell>
                <text:p text:style-name="P8"><text:span text:style-name="T38">Q4 (T10-T12)</text:span></text:p>
              </table:table-cell>
              <table:table-cell>
                <text:p text:style-name="P8"><text:span text:style-name="T38">Q1/27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3">PM (Minh)</text:span></text:p>
              </table:table-cell>
              <table:table-cell>
                <text:p text:style-name="P8"><text:span text:style-name="T54">30-40h/tuần</text:span></text:p>
              </table:table-cell>
              <table:table-cell>
                <text:p text:style-name="P8"><text:span text:style-name="T54">30-35h/tuần</text:span></text:p>
              </table:table-cell>
              <table:table-cell>
                <text:p text:style-name="P8"><text:span text:style-name="T54">30-35h/tuần</text:span></text:p>
              </table:table-cell>
              <table:table-cell>
                <text:p text:style-name="P8"><text:span text:style-name="T54">30-40h/tuần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53">Lead Dev / Solutions Architect</text:span></text:p>
              </table:table-cell>
              <table:table-cell>
                <text:p text:style-name="P8"><text:span text:style-name="T54">30h/tuần</text:span></text:p>
              </table:table-cell>
              <table:table-cell>
                <text:p text:style-name="P8"><text:span text:style-name="T54">25-30h/tuần</text:span></text:p>
              </table:table-cell>
              <table:table-cell>
                <text:p text:style-name="P8"><text:span text:style-name="T54">25-30h/tuần</text:span></text:p>
              </table:table-cell>
              <table:table-cell>
                <text:p text:style-name="P8"><text:span text:style-name="T54">25-30h/tuần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3">Developer (2-3 người)</text:span></text:p>
              </table:table-cell>
              <table:table-cell>
                <text:p text:style-name="P8"><text:span text:style-name="T54">30-40h/tuần</text:span></text:p>
              </table:table-cell>
              <table:table-cell>
                <text:p text:style-name="P8"><text:span text:style-name="T54">25-30h/tuần</text:span></text:p>
              </table:table-cell>
              <table:table-cell>
                <text:p text:style-name="P8"><text:span text:style-name="T54">25-30h/tuần</text:span></text:p>
              </table:table-cell>
              <table:table-cell>
                <text:p text:style-name="P8"><text:span text:style-name="T54">25-30h/tuần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53">BA / QA</text:span></text:p>
              </table:table-cell>
              <table:table-cell>
                <text:p text:style-name="P8"><text:span text:style-name="T54">15-20h/tuần</text:span></text:p>
              </table:table-cell>
              <table:table-cell>
                <text:p text:style-name="P8"><text:span text:style-name="T54">15-20h/tuần</text:span></text:p>
              </table:table-cell>
              <table:table-cell>
                <text:p text:style-name="P8"><text:span text:style-name="T54">20-25h/tuần</text:span></text:p>
              </table:table-cell>
              <table:table-cell>
                <text:p text:style-name="P8"><text:span text:style-name="T54">25-30h/tuần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3">Chị Mỹ (Kế toán Champion)</text:span></text:p>
              </table:table-cell>
              <table:table-cell>
                <text:p text:style-name="P8"><text:span text:style-name="T54">10h/tuần</text:span></text:p>
              </table:table-cell>
              <table:table-cell>
                <text:p text:style-name="P8"><text:span text:style-name="T54">5-8h/tuần</text:span></text:p>
              </table:table-cell>
              <table:table-cell>
                <text:p text:style-name="P8"><text:span text:style-name="T54">5h/tuần</text:span></text:p>
              </table:table-cell>
              <table:table-cell>
                <text:p text:style-name="P8"><text:span text:style-name="T54">5h/tuần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53">Sales / BD</text:span></text:p>
              </table:table-cell>
              <table:table-cell>
                <text:p text:style-name="P8"><text:span text:style-name="T55">—</text:span></text:p>
              </table:table-cell>
              <table:table-cell>
                <text:p text:style-name="P8"><text:span text:style-name="T55">—</text:span></text:p>
              </table:table-cell>
              <table:table-cell>
                <text:p text:style-name="P8"><text:span text:style-name="T54">10-15h/tuần</text:span></text:p>
              </table:table-cell>
              <table:table-cell>
                <text:p text:style-name="P8"><text:span text:style-name="T54">20-25h/tuần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53">CMO / Marketing</text:span></text:p>
              </table:table-cell>
              <table:table-cell>
                <text:p text:style-name="P8"><text:span text:style-name="T55">—</text:span></text:p>
              </table:table-cell>
              <table:table-cell>
                <text:p text:style-name="P8"><text:span text:style-name="T55">—</text:span></text:p>
              </table:table-cell>
              <table:table-cell>
                <text:p text:style-name="P8"><text:span text:style-name="T55">—</text:span></text:p>
              </table:table-cell>
              <table:table-cell>
                <text:p text:style-name="P8"><text:span text:style-name="T55">Hire T2/27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74;p12" draw:style-name="gr1" draw:text-style-name="P2" draw:layer="layout" svg:width="30.479cm" svg:height="1.269cm" svg:x="1.524cm" svg:y="13.97cm">
          <text:p text:style-name="P1"><text:span text:style-name="T56">Key asks từ lead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12" draw:style-name="gr15" draw:text-style-name="P10" draw:layer="layout" svg:width="15.112cm" svg:height="1.142cm" svg:x="1.524cm" svg:y="15.4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2" draw:style-name="gr5" draw:text-style-name="P2" draw:layer="layout" svg:width="14.477cm" svg:height="1.142cm" svg:x="2.032cm" svg:y="15.494cm">
          <text:p text:style-name="P1"><text:span text:style-name="T57">→ </text:span><text:span text:style-name="T36">Confirm allocation 2-3 dev full-time cho Q2 + BA/QA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2" draw:style-name="gr15" draw:text-style-name="P10" draw:layer="layout" svg:width="15.112cm" svg:height="1.142cm" svg:x="16.891cm" svg:y="15.4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2" draw:style-name="gr5" draw:text-style-name="P2" draw:layer="layout" svg:width="14.477cm" svg:height="1.142cm" svg:x="17.399cm" svg:y="15.494cm">
          <text:p text:style-name="P1"><text:span text:style-name="T57">→ </text:span><text:span text:style-name="T36">Approve hire Sales/BD trong Q4 (chuẩn bị commerci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2" draw:style-name="gr15" draw:text-style-name="P10" draw:layer="layout" svg:width="15.112cm" svg:height="1.142cm" svg:x="1.524cm" svg:y="16.8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2" draw:style-name="gr5" draw:text-style-name="P2" draw:layer="layout" svg:width="14.477cm" svg:height="1.142cm" svg:x="2.032cm" svg:y="16.891cm">
          <text:p text:style-name="P1"><text:span text:style-name="T57">→ </text:span><text:span text:style-name="T36">Approve hire CMO timeline trong T2/2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2" draw:style-name="gr15" draw:text-style-name="P10" draw:layer="layout" svg:width="15.112cm" svg:height="1.142cm" svg:x="16.891cm" svg:y="16.8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12" draw:style-name="gr5" draw:text-style-name="P2" draw:layer="layout" svg:width="14.477cm" svg:height="1.142cm" svg:x="17.399cm" svg:y="16.891cm">
          <text:p text:style-name="P1"><text:span text:style-name="T57">→ </text:span><text:span text:style-name="T36">Engage legal advisor từ Q3 cho Viindoo partn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12" draw:style-name="gr1" draw:text-style-name="P2" draw:layer="layout" svg:width="5.079cm" svg:height="0.761cm" svg:x="27.94cm" svg:y="18.034cm">
          <text:p text:style-name="P9"><text:span text:style-name="T12">CASSO ERP Plan | Minh |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p10:notes" draw:style-name="gr3" draw:layer="layout" svg:width="15.239cm" svg:height="8.572cm" svg:x="1.905cm" svg:y="3.175cm" draw:page-number="10" presentation:class="page"/>
          <draw:frame draw:name="Google Shape;268;p10:notes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69;p1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Google Shape;289;p13" draw:style-name="gr1" draw:text-style-name="P2" draw:layer="layout" svg:width="30.479cm" svg:height="1.269cm" svg:x="1.524cm" svg:y="1.016cm">
          <text:p text:style-name="P1"><text:span text:style-name="T13">05 — Risks &amp; Miti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13" draw:style-name="gr1" draw:text-style-name="P2" draw:layer="layout" svg:width="30.479cm" svg:height="1.777cm" svg:x="1.524cm" svg:y="2.286cm">
          <text:p text:style-name="P1"><text:span text:style-name="T37">Risks chính trong 12 thá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13" draw:style-name="standard" draw:layer="layout" svg:width="30.732cm" svg:height="11.429cm" svg:x="1.524cm" svg:y="4.572cm">
          <table:table>
            <table:table-column table:style-name="co8"/>
            <table:table-column table:style-name="co9"/>
            <table:table-column table:style-name="co1"/>
            <table:table-column table:style-name="co1"/>
            <table:table-column table:style-name="co10"/>
            <table:table-row table:style-name="ro1" table:default-cell-style-name="ce1">
              <table:table-cell>
                <text:p text:style-name="P1"><text:span text:style-name="T38">RISK</text:span></text:p>
              </table:table-cell>
              <table:table-cell>
                <text:p text:style-name="P1"><text:span text:style-name="T38">PROB</text:span></text:p>
              </table:table-cell>
              <table:table-cell>
                <text:p text:style-name="P1"><text:span text:style-name="T38">IMPACT</text:span></text:p>
              </table:table-cell>
              <table:table-cell>
                <text:p text:style-name="P1"><text:span text:style-name="T38">QUARTER</text:span></text:p>
              </table:table-cell>
              <table:table-cell>
                <text:p text:style-name="P1"><text:span text:style-name="T38">MITIGA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0">Go-live trễ deadline 30/6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0">Q2</text:span></text:p>
              </table:table-cell>
              <table:table-cell>
                <text:p text:style-name="P1"><text:span text:style-name="T40">Buffer 2 tuần, daily standup, escalate sớm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40">Chị Mỹ + team kế toán resist change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0">Q2-Q3</text:span></text:p>
              </table:table-cell>
              <table:table-cell>
                <text:p text:style-name="P1"><text:span text:style-name="T40">Champion strategy, training kỹ, parallel ru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0">Viindoo partnership không favorable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0">Q3</text:span></text:p>
              </table:table-cell>
              <table:table-cell>
                <text:p text:style-name="P1"><text:span text:style-name="T40">Có alternative plan (Odoo standalone build)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40">Scope creep từ stakeholders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0">Q2-Q3</text:span></text:p>
              </table:table-cell>
              <table:table-cell>
                <text:p text:style-name="P1"><text:span text:style-name="T40">Strict scope management, defer to Phase 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0">Pricing không competitive vs MISA/Bravo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0">Q4</text:span></text:p>
              </table:table-cell>
              <table:table-cell>
                <text:p text:style-name="P1"><text:span text:style-name="T40">Deep competitive research, test với prospects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40">Legal complexity (IP, partnership)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0">Q3-Q4</text:span></text:p>
              </table:table-cell>
              <table:table-cell>
                <text:p text:style-name="P1"><text:span text:style-name="T40">Engage legal advisor sớm từ Q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0">Prospects không commit free trial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40">Q4-Q1</text:span></text:p>
              </table:table-cell>
              <table:table-cell>
                <text:p text:style-name="P1"><text:span text:style-name="T40">Build pipeline 3x target, qualify kỹ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40">CMO hire delay</text:span></text:p>
              </table:table-cell>
              <table:table-cell>
                <text:p text:style-name="P8"><text:span text:style-name="T41">High</text:span></text:p>
              </table:table-cell>
              <table:table-cell>
                <text:p text:style-name="P8"><text:span text:style-name="T58">Med</text:span></text:p>
              </table:table-cell>
              <table:table-cell>
                <text:p text:style-name="P8"><text:span text:style-name="T40">Q1</text:span></text:p>
              </table:table-cell>
              <table:table-cell>
                <text:p text:style-name="P1"><text:span text:style-name="T40">Start search Q4, có temporary plan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92;p13" draw:style-name="gr1" draw:text-style-name="P2" draw:layer="layout" svg:width="5.079cm" svg:height="0.761cm" svg:x="27.94cm" svg:y="18.034cm">
          <text:p text:style-name="P9"><text:span text:style-name="T12">CASSO ERP Plan | Minh |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p11:notes" draw:style-name="gr3" draw:layer="layout" svg:width="15.239cm" svg:height="8.572cm" svg:x="1.905cm" svg:y="3.175cm" draw:page-number="11" presentation:class="page"/>
          <draw:frame draw:name="Google Shape;286;p11:notes" presentation:style-name="pr1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7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12" draw:style-name="dp4" draw:master-page-name="DEFAULT">
        <draw:custom-shape draw:name="Google Shape;298;p14" draw:style-name="gr1" draw:text-style-name="P2" draw:layer="layout" svg:width="30.479cm" svg:height="1.269cm" svg:x="1.524cm" svg:y="1.016cm">
          <text:p text:style-name="P1"><text:span text:style-name="T13">06 — Decision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14" draw:style-name="gr1" draw:text-style-name="P2" draw:layer="layout" svg:width="30.479cm" svg:height="1.777cm" svg:x="1.524cm" svg:y="2.286cm">
          <text:p text:style-name="P1"><text:span text:style-name="T37">Cần align với anh Điệp trong tháng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14" draw:style-name="gr7" draw:text-style-name="P10" draw:layer="layout" svg:width="30.479cm" svg:height="2.285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14" draw:style-name="gr4" draw:text-style-name="P7" draw:layer="layout" svg:width="0.202cm" svg:height="2.285cm" svg:x="1.524cm" svg:y="4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4" draw:style-name="gr5" draw:text-style-name="P2" draw:layer="layout" svg:width="1.523cm" svg:height="1.269cm" svg:x="2.159cm" svg:y="5.08cm">
          <text:p text:style-name="P1"><text:span text:style-name="T59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14" draw:style-name="gr5" draw:text-style-name="P2" draw:layer="layout" svg:width="21.589cm" svg:height="0.888cm" svg:x="3.937cm" svg:y="4.953cm">
          <text:p text:style-name="P1"><text:span text:style-name="T24">Vision &amp; Scope CASSO E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14" draw:style-name="gr5" draw:text-style-name="P2" draw:layer="layout" svg:width="21.589cm" svg:height="1.015cm" svg:x="3.937cm" svg:y="5.791cm">
          <text:p text:style-name="P1"><text:span text:style-name="T36">Confirm vision 12 tháng và commitment 1 năm của em cho dự án này. Align về scope và priorities cho Q2 (Banking, Tax, Digital Sig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14" draw:style-name="gr14" draw:text-style-name="P15" draw:layer="layout" svg:width="5.333cm" svg:height="1.269cm" svg:x="26.162cm" svg:y="5.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14" draw:style-name="gr5" draw:text-style-name="P2" draw:layer="layout" svg:width="4.825cm" svg:height="1.269cm" svg:x="26.416cm" svg:y="5.08cm">
          <text:p text:style-name="P1"><text:span text:style-name="T52">DECIDE BY</text:span></text:p>
          <text:p text:style-name="P1"><text:span text:style-name="T31">T5 tuần 2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14" draw:style-name="gr7" draw:text-style-name="P10" draw:layer="layout" svg:width="30.479cm" svg:height="2.285cm" svg:x="1.524cm" svg:y="7.1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14" draw:style-name="gr4" draw:text-style-name="P7" draw:layer="layout" svg:width="0.202cm" svg:height="2.285cm" svg:x="1.524cm" svg:y="7.1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14" draw:style-name="gr5" draw:text-style-name="P2" draw:layer="layout" svg:width="1.523cm" svg:height="1.269cm" svg:x="2.159cm" svg:y="7.62cm">
          <text:p text:style-name="P1"><text:span text:style-name="T59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14" draw:style-name="gr5" draw:text-style-name="P2" draw:layer="layout" svg:width="21.589cm" svg:height="0.888cm" svg:x="3.937cm" svg:y="7.493cm">
          <text:p text:style-name="P1"><text:span text:style-name="T24">Resource Allocation 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14" draw:style-name="gr5" draw:text-style-name="P2" draw:layer="layout" svg:width="21.589cm" svg:height="1.015cm" svg:x="3.937cm" svg:y="8.331cm">
          <text:p text:style-name="P1"><text:span text:style-name="T36">Confirm 2-3 dev full-time + BA/QA cho Q2 đạt go-live 30/6. Identify hoặc hire nếu cần. Confirm chị Mỹ allocate 10h/tuần làm Champ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14" draw:style-name="gr14" draw:text-style-name="P15" draw:layer="layout" svg:width="5.333cm" svg:height="1.269cm" svg:x="26.162cm" svg:y="7.6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14" draw:style-name="gr5" draw:text-style-name="P2" draw:layer="layout" svg:width="4.825cm" svg:height="1.269cm" svg:x="26.416cm" svg:y="7.62cm">
          <text:p text:style-name="P1"><text:span text:style-name="T52">DECIDE BY</text:span></text:p>
          <text:p text:style-name="P1"><text:span text:style-name="T31">T5 tuầ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14" draw:style-name="gr7" draw:text-style-name="P10" draw:layer="layout" svg:width="30.479cm" svg:height="2.285cm" svg:x="1.524cm" svg:y="9.65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14" draw:style-name="gr4" draw:text-style-name="P7" draw:layer="layout" svg:width="0.202cm" svg:height="2.285cm" svg:x="1.524cm" svg:y="9.65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4" draw:style-name="gr5" draw:text-style-name="P2" draw:layer="layout" svg:width="1.523cm" svg:height="1.269cm" svg:x="2.159cm" svg:y="10.16cm">
          <text:p text:style-name="P1"><text:span text:style-name="T59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4" draw:style-name="gr5" draw:text-style-name="P2" draw:layer="layout" svg:width="21.589cm" svg:height="0.888cm" svg:x="3.937cm" svg:y="10.033cm">
          <text:p text:style-name="P1"><text:span text:style-name="T24">Viindoo Training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4" draw:style-name="gr5" draw:text-style-name="P2" draw:layer="layout" svg:width="21.589cm" svg:height="1.015cm" svg:x="3.937cm" svg:y="10.871cm">
          <text:p text:style-name="P1"><text:span text:style-name="T36">Approve điều chỉnh training Viindoo từ 24h xuống 12-13h, focus Bán hàng + Kế toán. Bỏ modules Mua hàng/Kho/Dự án (CASSO không cần). Tiết kiệm cost + thời gian te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4" draw:style-name="gr14" draw:text-style-name="P15" draw:layer="layout" svg:width="5.333cm" svg:height="1.269cm" svg:x="26.162cm" svg:y="10.1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4" draw:style-name="gr5" draw:text-style-name="P2" draw:layer="layout" svg:width="4.825cm" svg:height="1.269cm" svg:x="26.416cm" svg:y="10.16cm">
          <text:p text:style-name="P1"><text:span text:style-name="T52">DECIDE BY</text:span></text:p>
          <text:p text:style-name="P1"><text:span text:style-name="T31">Trước 5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14" draw:style-name="gr7" draw:text-style-name="P10" draw:layer="layout" svg:width="30.479cm" svg:height="2.285cm" svg:x="1.524cm" svg:y="12.19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14" draw:style-name="gr4" draw:text-style-name="P7" draw:layer="layout" svg:width="0.202cm" svg:height="2.285cm" svg:x="1.524cm" svg:y="12.19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14" draw:style-name="gr5" draw:text-style-name="P2" draw:layer="layout" svg:width="1.523cm" svg:height="1.269cm" svg:x="2.159cm" svg:y="12.7cm">
          <text:p text:style-name="P1"><text:span text:style-name="T59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14" draw:style-name="gr5" draw:text-style-name="P2" draw:layer="layout" svg:width="21.589cm" svg:height="0.888cm" svg:x="3.937cm" svg:y="12.573cm">
          <text:p text:style-name="P1"><text:span text:style-name="T24">Viindoo Partnership Direction (Q3 previe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4" draw:style-name="gr5" draw:text-style-name="P2" draw:layer="layout" svg:width="21.589cm" svg:height="1.015cm" svg:x="3.937cm" svg:y="13.411cm">
          <text:p text:style-name="P1"><text:span text:style-name="T36">Anh align hướng đi cho Q3: explore Viindoo Partner/Reseller model vs build standalone trên Odoo open source. Em sẽ research &amp; propose chi tiết trong Q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14" draw:style-name="gr14" draw:text-style-name="P15" draw:layer="layout" svg:width="5.333cm" svg:height="1.269cm" svg:x="26.162cm" svg:y="12.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4" draw:style-name="gr5" draw:text-style-name="P2" draw:layer="layout" svg:width="4.825cm" svg:height="1.269cm" svg:x="26.416cm" svg:y="12.7cm">
          <text:p text:style-name="P1"><text:span text:style-name="T52">DECIDE BY</text:span></text:p>
          <text:p text:style-name="P1"><text:span text:style-name="T31">Discuss 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4" draw:style-name="gr7" draw:text-style-name="P10" draw:layer="layout" svg:width="30.479cm" svg:height="2.285cm" svg:x="1.524cm" svg:y="14.73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4" draw:style-name="gr4" draw:text-style-name="P7" draw:layer="layout" svg:width="0.202cm" svg:height="2.285cm" svg:x="1.524cm" svg:y="14.73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4" draw:style-name="gr5" draw:text-style-name="P2" draw:layer="layout" svg:width="1.523cm" svg:height="1.269cm" svg:x="2.159cm" svg:y="15.24cm">
          <text:p text:style-name="P1"><text:span text:style-name="T59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4" draw:style-name="gr5" draw:text-style-name="P2" draw:layer="layout" svg:width="21.589cm" svg:height="0.888cm" svg:x="3.937cm" svg:y="15.113cm">
          <text:p text:style-name="P1"><text:span text:style-name="T24">Budget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4" draw:style-name="gr5" draw:text-style-name="P2" draw:layer="layout" svg:width="21.589cm" svg:height="1.015cm" svg:x="3.937cm" svg:y="15.951cm">
          <text:p text:style-name="P1"><text:span text:style-name="T36">Confirm budget approach cho 4 quý: Viindoo license (commercial), legal counsel (Q3-Q4), Sales/BD hire (Q4), CMO hire (T2/2027). Anh approve framework, chi tiết quarterly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4" draw:style-name="gr14" draw:text-style-name="P15" draw:layer="layout" svg:width="5.333cm" svg:height="1.269cm" svg:x="26.162cm" svg:y="15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4" draw:style-name="gr5" draw:text-style-name="P2" draw:layer="layout" svg:width="4.825cm" svg:height="1.269cm" svg:x="26.416cm" svg:y="15.24cm">
          <text:p text:style-name="P1"><text:span text:style-name="T52">DECIDE BY</text:span></text:p>
          <text:p text:style-name="P1"><text:span text:style-name="T31">T5 tuần 2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4" draw:style-name="gr1" draw:text-style-name="P2" draw:layer="layout" svg:width="5.079cm" svg:height="0.761cm" svg:x="27.94cm" svg:y="18.034cm">
          <text:p text:style-name="P9"><text:span text:style-name="T12">CASSO ERP Plan | Minh |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p12:notes" draw:style-name="gr3" draw:layer="layout" svg:width="15.239cm" svg:height="8.572cm" svg:x="1.905cm" svg:y="3.175cm" draw:page-number="12" presentation:class="page"/>
          <draw:frame draw:name="Google Shape;295;p12:notes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96;p12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Google Shape;341;p15" draw:style-name="gr1" draw:text-style-name="P2" draw:layer="layout" svg:width="30.479cm" svg:height="2.539cm" svg:x="2.032cm" svg:y="5.08cm">
          <text:p text:style-name="P1"><text:span text:style-name="T60">Cảm ơn anh đã lắng ng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15" draw:style-name="gr2" draw:text-style-name="P3" draw:layer="layout" svg:width="3.809cm" svg:height="0.151cm" svg:x="2.032cm" svg:y="7.8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5" draw:style-name="gr1" draw:text-style-name="P2" draw:layer="layout" svg:width="30.479cm" svg:height="2.031cm" svg:x="2.032cm" svg:y="8.636cm">
          <text:p text:style-name="P1"><text:span text:style-name="T61">Mong nhận được feedback và quyết định từ anh để chúng ta cùng đưa CASSO ERP thành cô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15" draw:style-name="gr16" draw:text-style-name="P17" draw:layer="layout" svg:width="29.717cm" svg:height="4.571cm" svg:x="2.032cm" svg:y="12.19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15" draw:style-name="gr1" draw:text-style-name="P2" draw:layer="layout" svg:width="27.939cm" svg:height="0.761cm" svg:x="2.794cm" svg:y="12.7cm">
          <text:p text:style-name="P1"><text:span text:style-name="T62">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5" draw:style-name="gr1" draw:text-style-name="P2" draw:layer="layout" svg:width="28.701cm" svg:height="3.047cm" svg:x="2.794cm" svg:y="13.589cm">
          <text:p text:style-name="P1"><text:span text:style-name="T63">1. <text:s/>Anh review deck này và share feedback / questions / concerns</text:span></text:p>
          <text:p text:style-name="P18"><text:span text:style-name="T63">2. <text:s/>Em book 1 cuộc gặp 90 phút trong tuần T5-W2 để discuss 5 decision points</text:span></text:p>
          <text:p text:style-name="P18"><text:span text:style-name="T63">3. <text:s/>Sau cuộc gặp, em sẽ finalize Q2 plan và share với team trong T5-W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15" draw:style-name="gr1" draw:text-style-name="P2" draw:layer="layout" svg:width="30.479cm" svg:height="1.015cm" svg:x="2.032cm" svg:y="17.526cm">
          <text:p text:style-name="P1"><text:span text:style-name="T6">Minh — PM CASSO E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p13:notes" draw:style-name="gr3" draw:layer="layout" svg:width="15.239cm" svg:height="8.572cm" svg:x="1.905cm" svg:y="3.175cm" draw:page-number="13" presentation:class="page"/>
          <draw:frame draw:name="Google Shape;338;p13:notes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p1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9"/>
    <meta:generator>LibreOfficeDev/6.0.5.2$Linux_X86_64 LibreOffice_project/</meta:generator>
  </office:meta>
</office:document-meta>
</file>